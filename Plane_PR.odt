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A000000F28C3A56B6.png" manifest:media-type="image/png"/>
  <manifest:file-entry manifest:full-path="Pictures/1000000100000E4B00002000DF317A83.png" manifest:media-type="image/png"/>
  <manifest:file-entry manifest:full-path="Pictures/10000001000007D0000006F8290B36F1.png" manifest:media-type="image/png"/>
  <manifest:file-entry manifest:full-path="Pictures/100000010000038800000A604E573444.png" manifest:media-type="image/png"/>
  <manifest:file-entry manifest:full-path="Pictures/10000001000005D000000AC8D05CF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3.244cm"/>
    </style:style>
    <style:style style:name="Таблица1.B" style:family="table-column">
      <style:table-column-properties style:column-width="1.997cm"/>
    </style:style>
    <style:style style:name="Таблица1.C" style:family="table-column">
      <style:table-column-properties style:column-width="2.057cm"/>
    </style:style>
    <style:style style:name="Таблица1.D" style:family="table-column">
      <style:table-column-properties style:column-width="4.59cm"/>
    </style:style>
    <style:style style:name="Таблица1.E" style:family="table-column">
      <style:table-column-properties style:column-width="4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484cm" fo:margin-left="0cm" fo:margin-top="0cm" fo:margin-bottom="0cm" table:align="left" style:writing-mode="page"/>
    </style:style>
    <style:style style:name="Таблица2.A" style:family="table-column">
      <style:table-column-properties style:column-width="5.988cm"/>
    </style:style>
    <style:style style:name="Таблица2.B" style:family="table-column">
      <style:table-column-properties style:column-width="5.249cm"/>
    </style:style>
    <style:style style:name="Таблица2.C" style:family="table-column">
      <style:table-column-properties style:column-width="5.2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9" style:family="table-row">
      <style:table-row-properties style:min-row-height="1.515cm" fo:keep-together="auto"/>
    </style:style>
    <style:style style:name="Таблица2.10" style:family="table-row">
      <style:table-row-properties style:min-row-height="10.273cm" fo:keep-together="auto"/>
    </style:style>
    <style:style style:name="Таблица3" style:family="table">
      <style:table-properties style:width="16.484cm" fo:margin-left="0cm" fo:margin-top="0cm" fo:margin-bottom="0cm" table:align="left" style:writing-mode="page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981cm" fo:margin-left="0.009cm" fo:margin-top="0cm" fo:margin-bottom="0cm" table:align="left" style:writing-mode="page"/>
    </style:style>
    <style:style style:name="Таблица4.A" style:family="table-column">
      <style:table-column-properties style:column-width="1.236cm"/>
    </style:style>
    <style:style style:name="Таблица4.B" style:family="table-column">
      <style:table-column-properties style:column-width="2.477cm"/>
    </style:style>
    <style:style style:name="Таблица4.C" style:family="table-column">
      <style:table-column-properties style:column-width="9.313cm"/>
    </style:style>
    <style:style style:name="Таблица4.D" style:family="table-column">
      <style:table-column-properties style:column-width="3.955cm"/>
    </style:style>
    <style:style style:name="Таблица4.1" style:family="table-row">
      <style:table-row-properties style:min-row-height="1.489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0.533cm" fo:keep-together="always"/>
    </style:style>
    <style:style style:name="Таблица4.C2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fo:keep-together="always"/>
    </style:style>
    <style:style style:name="Таблица4.C3" style:family="table-cell">
      <style:table-cell-properties fo:padding-left="0.191cm" fo:padding-right="0.191cm" fo:padding-top="0cm" fo:padding-bottom="0cm" fo:border="0.5pt solid #000000"/>
    </style:style>
    <style:style style:name="Таблица4.4" style:family="table-row">
      <style:table-row-properties style:min-row-height="0.273cm" fo:keep-together="always"/>
    </style:style>
    <style:style style:name="Таблица4.C4" style:family="table-cell">
      <style:table-cell-properties fo:padding-left="0.191cm" fo:padding-right="0.191cm" fo:padding-top="0cm" fo:padding-bottom="0cm" fo:border="0.5pt solid #000000"/>
    </style:style>
    <style:style style:name="Таблица4.5" style:family="table-row">
      <style:table-row-properties fo:keep-together="always"/>
    </style:style>
    <style:style style:name="Таблица4.C5" style:family="table-cell">
      <style:table-cell-properties fo:padding-left="0.191cm" fo:padding-right="0.191cm" fo:padding-top="0cm" fo:padding-bottom="0cm" fo:border="0.5pt solid #000000"/>
    </style:style>
    <style:style style:name="Таблица4.6" style:family="table-row">
      <style:table-row-properties fo:keep-together="always"/>
    </style:style>
    <style:style style:name="Таблица4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7" style:family="table-row">
      <style:table-row-properties fo:keep-together="always"/>
    </style:style>
    <style:style style:name="Таблица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8" style:family="table-row">
      <style:table-row-properties fo:keep-together="always"/>
    </style:style>
    <style:style style:name="Таблица4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9" style:family="table-row">
      <style:table-row-properties fo:keep-together="always"/>
    </style:style>
    <style:style style:name="Таблица4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10" style:family="table-row">
      <style:table-row-properties fo:keep-together="always"/>
    </style:style>
    <style:style style:name="Таблица4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11" style:family="table-row">
      <style:table-row-properties fo:keep-together="always"/>
    </style:style>
    <style:style style:name="Таблица4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12" style:family="table-row">
      <style:table-row-properties fo:keep-together="always"/>
    </style:style>
    <style:style style:name="Таблица4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6.484cm" fo:margin-left="0cm" fo:margin-top="0cm" fo:margin-bottom="0cm" table:align="left" style:writing-mode="page"/>
    </style:style>
    <style:style style:name="Таблица5.A" style:family="table-column">
      <style:table-column-properties style:column-width="5.988cm"/>
    </style:style>
    <style:style style:name="Таблица5.B" style:family="table-column">
      <style:table-column-properties style:column-width="5.249cm"/>
    </style:style>
    <style:style style:name="Таблица5.C" style:family="table-column">
      <style:table-column-properties style:column-width="5.24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484cm" fo:margin-left="0cm" fo:margin-top="0cm" fo:margin-bottom="0cm" table:align="left" style:writing-mode="page"/>
    </style:style>
    <style:style style:name="Таблица6.A" style:family="table-column">
      <style:table-column-properties style:column-width="5.988cm"/>
    </style:style>
    <style:style style:name="Таблица6.B" style:family="table-column">
      <style:table-column-properties style:column-width="5.249cm"/>
    </style:style>
    <style:style style:name="Таблица6.C" style:family="table-column">
      <style:table-column-properties style:column-width="5.24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484cm" fo:margin-left="0cm" fo:margin-top="0cm" fo:margin-bottom="0cm" table:align="left" style:writing-mode="page"/>
    </style:style>
    <style:style style:name="Таблица7.A" style:family="table-column">
      <style:table-column-properties style:column-width="16.48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482cm" fo:margin-left="0cm" fo:margin-top="0cm" fo:margin-bottom="0cm" table:align="left" style:writing-mode="page"/>
    </style:style>
    <style:style style:name="Таблица8.A" style:family="table-column">
      <style:table-column-properties style:column-width="5.988cm"/>
    </style:style>
    <style:style style:name="Таблица8.B" style:family="table-column">
      <style:table-column-properties style:column-width="5.246cm"/>
    </style:style>
    <style:style style:name="Таблица8.C" style:family="table-column">
      <style:table-column-properties style:column-width="5.24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Таблица9" style:family="table">
      <style:table-properties style:width="18.461cm" table:align="left"/>
    </style:style>
    <style:style style:name="Таблица9.A" style:family="table-column">
      <style:table-column-properties style:column-width="2.847cm"/>
    </style:style>
    <style:style style:name="Таблица9.B" style:family="table-column">
      <style:table-column-properties style:column-width="2.267cm"/>
    </style:style>
    <style:style style:name="Таблица9.C" style:family="table-column">
      <style:table-column-properties style:column-width="9.453cm"/>
    </style:style>
    <style:style style:name="Таблица9.D" style:family="table-column">
      <style:table-column-properties style:column-width="3.895cm"/>
    </style:style>
    <style:style style:name="Таблица9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Таблица10" style:family="table">
      <style:table-properties style:width="18.461cm" table:align="left"/>
    </style:style>
    <style:style style:name="Таблица10.A" style:family="table-column">
      <style:table-column-properties style:column-width="2.256cm"/>
    </style:style>
    <style:style style:name="Таблица10.B" style:family="table-column">
      <style:table-column-properties style:column-width="2.275cm"/>
    </style:style>
    <style:style style:name="Таблица10.C" style:family="table-column">
      <style:table-column-properties style:column-width="10.022cm"/>
    </style:style>
    <style:style style:name="Таблица10.D" style:family="table-column">
      <style:table-column-properties style:column-width="3.907cm"/>
    </style:style>
    <style:style style:name="Таблица10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Таблица11" style:family="table">
      <style:table-properties style:width="18.461cm" table:align="left"/>
    </style:style>
    <style:style style:name="Таблица11.A" style:family="table-column">
      <style:table-column-properties style:column-width="2.256cm"/>
    </style:style>
    <style:style style:name="Таблица11.B" style:family="table-column">
      <style:table-column-properties style:column-width="2.193cm"/>
    </style:style>
    <style:style style:name="Таблица11.C" style:family="table-column">
      <style:table-column-properties style:column-width="10.167cm"/>
    </style:style>
    <style:style style:name="Таблица11.D" style:family="table-column">
      <style:table-column-properties style:column-width="3.845cm"/>
    </style:style>
    <style:style style:name="Таблица1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Standard" style:master-page-name="Standard">
      <style:paragraph-properties fo:margin-top="0cm" fo:margin-bottom="0cm" style:contextual-spacing="false" fo:line-height="115%" fo:text-align="start" style:justify-single-word="false" fo:orphans="0" fo:widows="0" fo:text-indent="0cm" style:auto-text-indent="false" style:page-number="1" fo:padding="0cm" fo:border="none" style:shadow="none" style:join-border="false" loext:word-spacing-minimum="75%" loext:word-spacing-maximum="133%"/>
      <style:text-properties fo:color="#000000" loext:opacity="100%" style:font-name="Arial1" fo:font-size="11pt" officeooo:paragraph-rsid="001ee140" style:font-name-asian="Arial2" style:font-size-asian="11pt" style:font-name-complex="Arial2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loext:word-spacing-minimum="75%" loext:word-spacing-maximum="133%"/>
      <style:text-properties fo:color="#000000" loext:opacity="100%" officeooo:paragraph-rsid="001ee140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loext:word-spacing-minimum="75%" loext:word-spacing-maximum="133%"/>
      <style:text-properties fo:color="#000000" loext:opacity="100%" fo:font-size="12pt" fo:font-weight="bold" officeooo:paragraph-rsid="001ee1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text-indent="0.064cm" style:auto-text-indent="false" loext:word-spacing-minimum="75%" loext:word-spacing-maximum="133%"/>
      <style:text-properties fo:color="#000000" loext:opacity="100%" fo:font-size="12pt" fo:font-weight="bold" officeooo:paragraph-rsid="001ee1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text-indent="0.064cm" style:auto-text-indent="false" loext:word-spacing-minimum="75%" loext:word-spacing-maximum="133%"/>
      <style:text-properties fo:color="#000000" loext:opacity="100%" officeooo:paragraph-rsid="001ee140"/>
    </style:style>
    <style:style style:name="P6" style:family="paragraph" style:parent-style-name="Standard">
      <style:paragraph-properties fo:margin-top="0cm" fo:margin-bottom="0cm" style:contextual-spacing="false" fo:text-indent="0.039cm" style:auto-text-indent="false"/>
      <style:text-properties fo:color="#000000" loext:opacity="100%" officeooo:paragraph-rsid="001ee140"/>
    </style:style>
    <style:style style:name="P7" style:family="paragraph" style:parent-style-name="Standard">
      <style:paragraph-properties fo:margin-top="0cm" fo:margin-bottom="0cm" style:contextual-spacing="false" fo:text-indent="0.064cm" style:auto-text-indent="false"/>
      <style:text-properties fo:color="#000000" loext:opacity="100%" officeooo:paragraph-rsid="001ee140"/>
    </style:style>
    <style:style style:name="P8" style:family="paragraph" style:parent-style-name="Standard">
      <style:paragraph-properties fo:margin-top="0cm" fo:margin-bottom="0cm" style:contextual-spacing="false" fo:text-indent="0.039cm" style:auto-text-indent="false"/>
      <style:text-properties fo:color="#000000" loext:opacity="100%" fo:font-size="12pt" officeooo:paragraph-rsid="001ee140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indent="0.064cm" style:auto-text-indent="false"/>
      <style:text-properties fo:color="#000000" loext:opacity="100%" fo:font-size="12pt" officeooo:paragraph-rsid="001ee140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text-indent="0cm" style:auto-text-indent="false"/>
      <style:text-properties fo:color="#000000" loext:opacity="100%" officeooo:paragraph-rsid="001ee140"/>
    </style:style>
    <style:style style:name="P11" style:family="paragraph" style:parent-style-name="Standard">
      <style:paragraph-properties fo:margin-top="0cm" fo:margin-bottom="0cm" style:contextual-spacing="false" fo:text-indent="0cm" style:auto-text-indent="false"/>
      <style:text-properties fo:color="#000000" loext:opacity="100%" fo:font-size="12pt" officeooo:paragraph-rsid="001ee140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text-indent="0.064cm" style:auto-text-indent="false" loext:word-spacing-minimum="75%" loext:word-spacing-maximum="133%"/>
      <style:text-properties fo:color="#000000" loext:opacity="100%" style:text-position="super 58%" fo:font-size="12pt" fo:font-style="italic" officeooo:paragraph-rsid="001ee140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text-indent="0.064cm" style:auto-text-indent="false" loext:word-spacing-minimum="75%" loext:word-spacing-maximum="133%"/>
      <style:text-properties fo:color="#000000" loext:opacity="100%" officeooo:paragraph-rsid="001ee140"/>
    </style:style>
    <style:style style:name="P14" style:family="paragraph" style:parent-style-name="Standard">
      <style:paragraph-properties fo:text-indent="0cm" style:auto-text-indent="false"/>
      <style:text-properties fo:color="#000000" loext:opacity="100%" officeooo:paragraph-rsid="001ee140"/>
    </style:style>
    <style:style style:name="P15" style:family="paragraph" style:parent-style-name="Standard">
      <style:paragraph-properties fo:text-align="end" style:justify-single-word="false" fo:text-indent="0cm" style:auto-text-indent="false" loext:word-spacing-minimum="75%" loext:word-spacing-maximum="133%"/>
      <style:text-properties fo:color="#000000" loext:opacity="100%" officeooo:paragraph-rsid="001ee140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loext:word-spacing-minimum="75%" loext:word-spacing-maximum="133%"/>
      <style:text-properties fo:color="#000000" loext:opacity="100%" officeooo:paragraph-rsid="001ee140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loext:word-spacing-minimum="75%" loext:word-spacing-maximum="133%"/>
      <style:text-properties fo:color="#000000" loext:opacity="100%" fo:language="ru" fo:country="RU" officeooo:paragraph-rsid="001ee140"/>
    </style:style>
    <style:style style:name="P18" style:family="paragraph" style:parent-style-name="Standard" style:list-style-name="WWNum1">
      <style:paragraph-properties fo:margin-top="0cm" fo:margin-bottom="0cm" style:contextual-spacing="false" fo:padding="0cm" fo:border="none" style:shadow="none" style:join-border="false"/>
      <style:text-properties fo:color="#000000" loext:opacity="100%" officeooo:paragraph-rsid="001ee140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text-indent="0cm" style:auto-text-indent="false" style:punctuation-wrap="hanging" style:vertical-align="baseline" loext:word-spacing-minimum="75%" loext:word-spacing-maximum="133%"/>
      <style:text-properties fo:color="#000000" loext:opacity="100%" fo:font-size="12pt" fo:language="en" fo:country="US" style:text-underline-style="solid" style:text-underline-width="auto" style:text-underline-color="font-color" officeooo:paragraph-rsid="001ee140" style:font-size-asian="12pt" style:font-size-complex="12pt"/>
    </style:style>
    <style:style style:name="P20" style:family="paragraph" style:parent-style-name="Standard">
      <style:paragraph-properties fo:margin-right="0.998cm" fo:padding-left="0cm" fo:padding-right="0cm" fo:padding-top="0cm" fo:padding-bottom="0.035cm" fo:border-left="none" fo:border-right="none" fo:border-top="none" fo:border-bottom="1.5pt solid #000000"/>
      <style:text-properties fo:color="#000000" loext:opacity="100%" officeooo:paragraph-rsid="001eed2c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officeooo:paragraph-rsid="001eed2c" style:font-size-asian="12pt"/>
    </style:style>
    <style:style style:name="P22" style:family="paragraph" style:parent-style-name="Standard">
      <style:text-properties fo:color="#000000" loext:opacity="100%" officeooo:paragraph-rsid="001eed2c"/>
    </style:style>
    <style:style style:name="P23" style:family="paragraph" style:parent-style-name="Standard">
      <style:paragraph-properties fo:margin-right="0.998cm" fo:text-align="center" style:justify-single-word="false"/>
      <style:text-properties fo:color="#000000" loext:opacity="100%" fo:font-size="12pt" officeooo:paragraph-rsid="001eed2c" style:font-size-asian="12pt"/>
    </style:style>
    <style:style style:name="P24" style:family="paragraph" style:parent-style-name="Plain_20_Text">
      <style:paragraph-properties fo:text-align="center" style:justify-single-word="false" fo:text-indent="1cm" style:auto-text-indent="false"/>
      <style:text-properties fo:color="#000000" loext:opacity="100%" officeooo:paragraph-rsid="001eed2c"/>
    </style:style>
    <style:style style:name="P25" style:family="paragraph" style:parent-style-name="Plain_20_Text">
      <style:text-properties fo:color="#000000" loext:opacity="100%" style:font-name="Times New Roman" officeooo:paragraph-rsid="001eed2c"/>
    </style:style>
    <style:style style:name="P26" style:family="paragraph" style:parent-style-name="Plain_20_Text">
      <style:paragraph-properties fo:text-align="justify" style:justify-single-word="false" fo:text-indent="1cm" style:auto-text-indent="false" loext:word-spacing-minimum="75%" loext:word-spacing-maximum="133%"/>
      <style:text-properties fo:color="#000000" loext:opacity="100%" officeooo:paragraph-rsid="001eed2c"/>
    </style:style>
    <style:style style:name="P27" style:family="paragraph" style:parent-style-name="Plain_20_Text">
      <style:paragraph-properties fo:text-align="justify" style:justify-single-word="false" fo:text-indent="1cm" style:auto-text-indent="false" loext:word-spacing-minimum="75%" loext:word-spacing-maximum="133%"/>
      <style:text-properties fo:color="#000000" loext:opacity="100%" style:font-name="Times New Roman" fo:font-size="12pt" officeooo:paragraph-rsid="001eed2c" style:font-size-asian="12pt"/>
    </style:style>
    <style:style style:name="P28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fo:color="#000000" loext:opacity="100%" officeooo:paragraph-rsid="001eed2c"/>
    </style:style>
    <style:style style:name="P29" style:family="paragraph" style:parent-style-name="Standard">
      <style:paragraph-properties fo:margin-top="0cm" fo:margin-bottom="0cm" style:contextual-spacing="false" fo:line-height="100%" fo:text-indent="1.251cm" style:auto-text-indent="false" style:punctuation-wrap="hanging" style:vertical-align="baseline"/>
      <style:text-properties fo:color="#000000" loext:opacity="100%" fo:font-size="12pt" fo:language="ru" fo:country="RU" style:text-underline-style="solid" style:text-underline-width="auto" style:text-underline-color="font-color" officeooo:paragraph-rsid="001ee140" style:font-size-asian="12pt" style:font-size-complex="12pt"/>
    </style:style>
    <style:style style:name="P30" style:family="paragraph" style:parent-style-name="Standard">
      <style:paragraph-properties fo:text-indent="0cm" style:auto-text-indent="false"/>
      <style:text-properties fo:color="#000000" loext:opacity="100%" fo:font-size="12pt" fo:language="ru" fo:country="RU" style:text-underline-style="solid" style:text-underline-width="auto" style:text-underline-color="font-color" officeooo:paragraph-rsid="001ee140" style:font-size-asian="12pt" style:font-size-complex="12pt"/>
    </style:style>
    <style:style style:name="P31" style:family="paragraph" style:parent-style-name="Standard">
      <style:paragraph-properties fo:margin-top="0.212cm" fo:margin-bottom="0cm" style:contextual-spacing="false" fo:text-indent="0cm" style:auto-text-indent="false"/>
      <style:text-properties fo:color="#000000" loext:opacity="100%" fo:font-size="12pt" fo:language="ru" fo:country="RU" fo:font-weight="bold" officeooo:paragraph-rsid="001ee14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 loext:word-spacing-minimum="75%" loext:word-spacing-maximum="133%"/>
      <style:text-properties fo:color="#000000" loext:opacity="100%" fo:font-size="12pt" fo:font-weight="bold" officeooo:paragraph-rsid="001ee14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orphans="0" fo:widows="0" fo:text-indent="0cm" style:auto-text-indent="false" loext:word-spacing-minimum="75%" loext:word-spacing-maximum="133%"/>
      <style:text-properties fo:color="#000000" loext:opacity="100%" officeooo:paragraph-rsid="001ee140"/>
    </style:style>
    <style:style style:name="P34" style:family="paragraph" style:parent-style-name="Standard">
      <style:paragraph-properties fo:margin-left="-0.138cm" fo:margin-right="-0.191cm" fo:margin-top="0cm" fo:margin-bottom="0.212cm" style:contextual-spacing="false" fo:line-height="100%" fo:text-align="center" style:justify-single-word="false" fo:orphans="0" fo:widows="0" fo:text-indent="-0.039cm" style:auto-text-indent="false" loext:word-spacing-minimum="75%" loext:word-spacing-maximum="133%"/>
      <style:text-properties fo:color="#000000" loext:opacity="100%" officeooo:paragraph-rsid="001ee140"/>
    </style:style>
    <style:style style:name="P35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orphans="0" fo:widows="0" fo:text-indent="0.009cm" style:auto-text-indent="false" loext:word-spacing-minimum="75%" loext:word-spacing-maximum="133%"/>
      <style:text-properties fo:color="#000000" loext:opacity="100%" officeooo:paragraph-rsid="001ee140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text-indent="0cm" style:auto-text-indent="false" loext:word-spacing-minimum="75%" loext:word-spacing-maximum="133%"/>
      <style:text-properties fo:color="#000000" loext:opacity="100%" officeooo:paragraph-rsid="001ee140"/>
    </style:style>
    <style:style style:name="P3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0" fo:widows="0" fo:background-color="#ffffff" loext:word-spacing-minimum="75%" loext:word-spacing-maximum="133%"/>
      <style:text-properties fo:color="#000000" loext:opacity="100%" officeooo:paragraph-rsid="001ee140"/>
    </style:style>
    <style:style style:name="P38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orphans="0" fo:widows="0" fo:text-indent="0cm" style:auto-text-indent="false" loext:word-spacing-minimum="75%" loext:word-spacing-maximum="133%"/>
      <style:text-properties fo:color="#000000" loext:opacity="100%" fo:font-size="12pt" officeooo:paragraph-rsid="001ee140" style:font-size-asian="12pt" style:font-size-complex="12pt"/>
    </style:style>
    <style:style style:name="P39" style:family="paragraph" style:parent-style-name="Standard">
      <style:paragraph-properties fo:margin-left="0.189cm" fo:margin-top="0cm" fo:margin-bottom="0cm" style:contextual-spacing="false" fo:line-height="100%" fo:text-align="start" style:justify-single-word="false" fo:orphans="0" fo:widows="0" fo:text-indent="0cm" style:auto-text-indent="false" fo:padding="0cm" fo:border="none" style:shadow="none" style:join-border="false" loext:word-spacing-minimum="75%" loext:word-spacing-maximum="133%"/>
      <style:text-properties fo:color="#000000" loext:opacity="100%" officeooo:paragraph-rsid="001ee140"/>
    </style:style>
    <style:style style:name="P40" style:family="paragraph" style:parent-style-name="Standard">
      <style:paragraph-properties fo:margin-top="0cm" fo:margin-bottom="0cm" style:contextual-spacing="false"/>
      <style:text-properties fo:color="#000000" loext:opacity="100%" fo:font-size="12pt" officeooo:paragraph-rsid="001ee140" style:font-size-asian="12pt" style:font-size-complex="12pt"/>
    </style:style>
    <style:style style:name="P41" style:family="paragraph" style:parent-style-name="Standard">
      <style:paragraph-properties fo:margin-top="0cm" fo:margin-bottom="0.247cm" style:contextual-spacing="false" fo:line-height="115%" fo:padding="0cm" fo:border="none" style:shadow="none" style:join-border="false"/>
      <style:text-properties fo:color="#000000" loext:opacity="100%" officeooo:paragraph-rsid="001ee140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 loext:word-spacing-minimum="75%" loext:word-spacing-maximum="133%"/>
      <style:text-properties fo:color="#000000" loext:opacity="100%" officeooo:paragraph-rsid="001ee140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text-indent="0.064cm" style:auto-text-indent="false" loext:word-spacing-minimum="75%" loext:word-spacing-maximum="133%"/>
      <style:text-properties fo:color="#000000" loext:opacity="100%" fo:font-size="12pt" officeooo:paragraph-rsid="001ee14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loext:word-spacing-minimum="75%" loext:word-spacing-maximum="133%"/>
      <style:text-properties fo:color="#000000" loext:opacity="100%" style:text-position="super 58%" fo:font-size="12pt" fo:font-style="italic" officeooo:paragraph-rsid="001ee140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loext:word-spacing-minimum="75%" loext:word-spacing-maximum="133%"/>
      <style:text-properties fo:color="#000000" loext:opacity="100%" officeooo:paragraph-rsid="001ee140"/>
    </style:style>
    <style:style style:name="P46" style:family="paragraph" style:parent-style-name="Standard" style:master-page-name="Converted1">
      <style:paragraph-properties fo:margin-top="0cm" fo:margin-bottom="0cm" style:contextual-spacing="false" fo:line-height="115%" fo:text-align="start" style:justify-single-word="false" fo:orphans="0" fo:widows="0" fo:text-indent="0cm" style:auto-text-indent="false" style:page-number="auto" fo:padding="0cm" fo:border="none" style:shadow="none" style:join-border="false" loext:word-spacing-minimum="75%" loext:word-spacing-maximum="133%"/>
      <style:text-properties fo:color="#000000" loext:opacity="100%" fo:font-size="11pt" fo:font-style="italic" officeooo:paragraph-rsid="001ee140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text-indent="0cm" style:auto-text-indent="false"/>
      <style:text-properties fo:color="#000000" loext:opacity="100%" fo:language="ru" fo:country="RU" officeooo:paragraph-rsid="001ee140"/>
    </style:style>
    <style:style style:name="P48" style:family="paragraph" style:parent-style-name="Heading_20_1">
      <style:paragraph-properties fo:margin-top="0cm" fo:margin-bottom="0cm" style:contextual-spacing="false" fo:text-indent="0cm" style:auto-text-indent="false"/>
      <style:text-properties fo:color="#000000" loext:opacity="100%" style:font-name="Times New Roman" fo:font-size="14pt" fo:font-weight="bold" officeooo:paragraph-rsid="001ee140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loext:word-spacing-minimum="75%" loext:word-spacing-maximum="133%"/>
      <style:text-properties fo:color="#000000" loext:opacity="100%" fo:language="ru" fo:country="RU" fo:font-weight="bold" officeooo:paragraph-rsid="001ee140" style:font-weight-asian="bold" style:font-weight-complex="bold"/>
    </style:style>
    <style:style style:name="P50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fo:color="#000000" loext:opacity="100%" fo:language="ru" fo:country="RU"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fo:color="#000000" loext:opacity="100%" fo:language="ru" fo:country="RU" officeooo:rsid="00198e2a"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fo:language="ru" fo:country="RU"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 style:master-page-name="Converted2">
      <style:paragraph-properties fo:margin-top="0.212cm" fo:margin-bottom="0cm" style:contextual-spacing="false" fo:hyphenation-ladder-count="no-limit" fo:hyphenation-keep="auto" loext:hyphenation-keep-type="column" loext:hyphenation-keep-line="false" fo:text-indent="0cm" style:auto-text-indent="false" style:page-number="auto"/>
      <style:text-properties fo:language="en" fo:country="US"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 style:vertical-align="baseline" loext:word-spacing-minimum="75%" loext:word-spacing-maximum="133%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 fo:text-indent="-1.752cm" style:auto-text-indent="false" style:vertical-align="baseline" loext:word-spacing-minimum="75%" loext:word-spacing-maximum="133%"/>
      <style:text-properties fo:color="#000000" loext:opacity="100%" fo:font-size="10pt" officeooo:paragraph-rsid="001ee140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.212cm" fo:margin-bottom="0cm" style:contextual-spacing="false" fo:line-height="150%" fo:text-align="center" style:justify-single-word="false" fo:hyphenation-ladder-count="no-limit" fo:hyphenation-keep="auto" loext:hyphenation-keep-type="column" loext:hyphenation-keep-line="false" fo:padding-left="0cm" fo:padding-right="0cm" fo:padding-top="0.035cm" fo:padding-bottom="0cm" fo:border-left="none" fo:border-right="none" fo:border-top="2.24pt solid #000000" fo:border-bottom="none" style:vertical-align="baseline" loext:word-spacing-minimum="75%" loext:word-spacing-maximum="133%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line-height="100%" fo:text-align="end" style:justify-single-word="false" fo:hyphenation-ladder-count="no-limit" fo:hyphenation-keep="auto" loext:hyphenation-keep-type="column" loext:hyphenation-keep-line="false" fo:text-indent="1.251cm" style:auto-text-indent="false" style:vertical-align="baseline" loext:word-spacing-minimum="75%" loext:word-spacing-maximum="133%"/>
      <style:text-properties fo:color="#000000" loext:opacity="100%" fo:font-size="13pt" fo:language="ru" fo:country="RU" fo:font-weight="bold" officeooo:paragraph-rsid="001ee140" style:font-size-asian="13pt" style:font-weight-asian="bold" style:font-size-complex="13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line-height="100%" fo:text-align="center" style:justify-single-word="false" fo:hyphenation-ladder-count="no-limit" fo:hyphenation-keep="auto" loext:hyphenation-keep-type="column" loext:hyphenation-keep-line="false" fo:text-indent="1.251cm" style:auto-text-indent="false" style:vertical-align="baseline" loext:word-spacing-minimum="75%" loext:word-spacing-maximum="133%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line-height="100%" fo:text-align="center" style:justify-single-word="false" fo:hyphenation-ladder-count="no-limit" fo:hyphenation-keep="auto" loext:hyphenation-keep-type="column" loext:hyphenation-keep-line="false" fo:text-indent="1.251cm" style:auto-text-indent="false" style:vertical-align="baseline" loext:word-spacing-minimum="75%" loext:word-spacing-maximum="133%"/>
      <style:text-properties fo:color="#000000" loext:opacity="100%"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line-height="100%" fo:hyphenation-ladder-count="no-limit" fo:hyphenation-keep="auto" loext:hyphenation-keep-type="column" loext:hyphenation-keep-line="false" fo:text-indent="0cm" style:auto-text-indent="false" style:vertical-align="baseline"/>
      <style:text-properties fo:color="#000000" loext:opacity="100%" fo:language="ru" fo:country="RU"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line-height="150%" fo:hyphenation-ladder-count="no-limit" fo:hyphenation-keep="auto" loext:hyphenation-keep-type="column" loext:hyphenation-keep-line="false" fo:text-indent="0cm" style:auto-text-indent="false" style:vertical-align="baseline"/>
      <style:text-properties fo:color="#000000" loext:opacity="100%" fo:language="ru" fo:country="RU"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line-height="150%" fo:hyphenation-ladder-count="no-limit" fo:hyphenation-keep="auto" loext:hyphenation-keep-type="column" loext:hyphenation-keep-line="false" style:vertical-align="baseline"/>
      <style:text-properties fo:color="#000000" loext:opacity="100%"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2.498cm" fo:line-height="100%" fo:text-align="end" style:justify-single-word="false" fo:hyphenation-ladder-count="no-limit" fo:hyphenation-keep="auto" loext:hyphenation-keep-type="column" loext:hyphenation-keep-line="false" fo:text-indent="-2.498cm" style:auto-text-indent="false" style:vertical-align="baseline" loext:word-spacing-minimum="75%" loext:word-spacing-maximum="133%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2.498cm" fo:line-height="100%" fo:text-align="end" style:justify-single-word="false" fo:hyphenation-ladder-count="no-limit" fo:hyphenation-keep="auto" loext:hyphenation-keep-type="column" loext:hyphenation-keep-line="false" fo:text-indent="-2.498cm" style:auto-text-indent="false" style:vertical-align="baseline" loext:word-spacing-minimum="75%" loext:word-spacing-maximum="133%"/>
      <style:text-properties fo:color="#000000" loext:opacity="100%" fo:language="ru" fo:country="RU"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line-height="100%" fo:hyphenation-ladder-count="no-limit" fo:hyphenation-keep="auto" loext:hyphenation-keep-type="column" loext:hyphenation-keep-line="false" fo:text-indent="0cm" style:auto-text-indent="false" style:vertical-align="baseline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left="2.498cm" fo:line-height="100%" fo:hyphenation-ladder-count="no-limit" fo:hyphenation-keep="auto" loext:hyphenation-keep-type="column" loext:hyphenation-keep-line="false" fo:text-indent="-2.498cm" style:auto-text-indent="false" style:vertical-align="baseline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P68" style:family="paragraph" style:parent-style-name="Standard" style:master-page-name="Converted3">
      <style:paragraph-properties fo:margin-left="2.498cm" fo:line-height="100%" fo:hyphenation-ladder-count="no-limit" fo:hyphenation-keep="auto" loext:hyphenation-keep-type="column" loext:hyphenation-keep-line="false" fo:text-indent="-2.498cm" style:auto-text-indent="false" style:page-number="auto" style:vertical-align="baseline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.036cm" style:type="right" style:leader-style="dotted" style:leader-text="."/>
        </style:tab-stops>
      </style:paragraph-properties>
    </style:style>
    <style:style style:name="P71" style:family="paragraph" style:parent-style-name="Contents_20_Heading">
      <style:text-properties officeooo:paragraph-rsid="001ee140"/>
    </style:style>
    <style:style style:name="P72" style:family="paragraph" style:parent-style-name="Standard">
      <style:text-properties officeooo:paragraph-rsid="001ee140"/>
    </style:style>
    <style:style style:name="P73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Heading_20_1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75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officeooo:paragraph-rsid="001ee14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fo:language="en" fo:country="US" officeooo:paragraph-rsid="001ee140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Standard">
      <style:paragraph-properties fo:margin-top="0.21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language="ru" fo:country="RU" officeooo:paragraph-rsid="001eed2c" style:font-name-asian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style:paragraph-properties fo:margin-right="0.998cm" fo:padding-left="0cm" fo:padding-right="0cm" fo:padding-top="0cm" fo:padding-bottom="0.035cm" fo:border-left="none" fo:border-right="none" fo:border-top="none" fo:border-bottom="1.5pt solid #000000"/>
      <style:text-properties officeooo:paragraph-rsid="001eed2c"/>
    </style:style>
    <style:style style:name="P79" style:family="paragraph" style:parent-style-name="Standard">
      <style:paragraph-properties fo:text-align="center" style:justify-single-word="false"/>
      <style:text-properties fo:font-size="12pt" officeooo:paragraph-rsid="001eed2c" style:font-size-asian="12pt"/>
    </style:style>
    <style:style style:name="P80" style:family="paragraph" style:parent-style-name="Standard">
      <style:text-properties officeooo:paragraph-rsid="001eed2c"/>
    </style:style>
    <style:style style:name="P81" style:family="paragraph" style:parent-style-name="Standard">
      <style:paragraph-properties fo:margin-right="0.998cm" fo:text-align="center" style:justify-single-word="false"/>
      <style:text-properties fo:font-size="12pt" officeooo:paragraph-rsid="001eed2c" style:font-size-asian="12pt"/>
    </style:style>
    <style:style style:name="P82" style:family="paragraph" style:parent-style-name="Plain_20_Text">
      <style:paragraph-properties fo:text-align="center" style:justify-single-word="false" fo:text-indent="1cm" style:auto-text-indent="false"/>
      <style:text-properties officeooo:paragraph-rsid="001eed2c"/>
    </style:style>
    <style:style style:name="P83" style:family="paragraph" style:parent-style-name="Plain_20_Text">
      <style:text-properties style:font-name="Times New Roman" officeooo:paragraph-rsid="001eed2c"/>
    </style:style>
    <style:style style:name="P84" style:family="paragraph" style:parent-style-name="Plain_20_Text">
      <style:paragraph-properties fo:text-align="justify" style:justify-single-word="false" fo:text-indent="1cm" style:auto-text-indent="false" loext:word-spacing-minimum="75%" loext:word-spacing-maximum="133%"/>
      <style:text-properties officeooo:paragraph-rsid="001eed2c"/>
    </style:style>
    <style:style style:name="P85" style:family="paragraph" style:parent-style-name="Plain_20_Text">
      <style:paragraph-properties fo:text-align="justify" style:justify-single-word="false" fo:text-indent="1cm" style:auto-text-indent="false" loext:word-spacing-minimum="75%" loext:word-spacing-maximum="133%"/>
      <style:text-properties style:font-name="Times New Roman" fo:font-size="12pt" officeooo:paragraph-rsid="001eed2c" style:font-size-asian="12pt"/>
    </style:style>
    <style:style style:name="P86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officeooo:paragraph-rsid="001eed2c"/>
    </style:style>
    <style:style style:name="P87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Times New Roman" fo:font-size="12pt" style:text-underline-style="solid" style:text-underline-width="auto" style:text-underline-color="font-color" officeooo:paragraph-rsid="001eed2c" style:font-size-asian="12pt" style:font-size-complex="12pt"/>
    </style:style>
    <style:style style:name="P88" style:family="paragraph" style:parent-style-name="Heading_20_2">
      <style:text-properties style:font-name="Times New Roman"/>
    </style:style>
    <style:style style:name="P89" style:family="paragraph">
      <style:paragraph-properties fo:text-align="center"/>
    </style:style>
    <style:style style:name="P90" style:family="paragraph">
      <loext:graphic-properties draw:fill-color="#cccccc"/>
      <style:paragraph-properties fo:text-align="center"/>
    </style:style>
    <style:style style:name="P91" style:family="paragraph" style:parent-style-name="Heading_20_2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Google Sans" fo:font-size="12pt" style:text-underline-style="solid" style:text-underline-width="auto" style:text-underline-color="font-color" officeooo:paragraph-rsid="001eed2c" style:font-size-asian="12pt" style:font-size-complex="12pt"/>
    </style:style>
    <style:style style:name="P92" style:family="paragraph" style:parent-style-name="Text_20_body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Google Sans" fo:font-size="12pt" style:text-underline-style="solid" style:text-underline-width="auto" style:text-underline-color="font-color" officeooo:paragraph-rsid="001eed2c" style:font-size-asian="12pt" style:font-size-complex="12pt"/>
    </style:style>
    <style:style style:name="P93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loext:word-spacing-minimum="75%" loext:word-spacing-maximum="133%"/>
      <style:text-properties style:font-name="Google Sans Text" style:text-underline-style="none" style:font-size-asian="12pt"/>
    </style:style>
    <style:style style:name="P94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loext:word-spacing-minimum="75%" loext:word-spacing-maximum="133%"/>
      <style:text-properties style:font-name="Times New Roman" style:text-underline-style="solid" style:text-underline-width="auto" style:text-underline-color="font-color" style:font-size-asian="12pt"/>
    </style:style>
    <style:style style:name="P95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loext:word-spacing-minimum="75%" loext:word-spacing-maximum="133%"/>
      <style:text-properties style:font-name="Google Sans Text" style:text-underline-style="none" fo:font-weight="bold" style:font-size-asian="12pt"/>
    </style:style>
    <style:style style:name="P9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9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9" style:family="paragraph" style:parent-style-name="Plain_20_Text">
      <style:paragraph-properties fo:margin-left="0cm" fo:text-align="justify" style:justify-single-word="false" fo:orphans="2" fo:widows="2" fo:text-indent="0cm" style:auto-text-indent="false" loext:word-spacing-minimum="75%" loext:word-spacing-maximum="133%"/>
      <style:text-properties style:font-name="Times New Roman" fo:font-size="12pt" style:text-underline-style="solid" style:text-underline-width="auto" style:text-underline-color="font-color" officeooo:paragraph-rsid="001eed2c" style:font-size-asian="12pt" style:font-size-complex="12pt"/>
    </style:style>
    <style:style style:name="P100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loext:word-spacing-minimum="75%" loext:word-spacing-maximum="133%"/>
      <style:text-properties style:font-name="Times New Roman" style:text-underline-style="none" style:font-size-asian="12pt"/>
    </style:style>
    <style:style style:name="P101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loext:word-spacing-minimum="75%" loext:word-spacing-maximum="133%"/>
      <style:text-properties style:font-name="Times New Roman" style:text-underline-style="none" fo:font-weight="bold" style:font-size-asian="12pt"/>
    </style:style>
    <style:style style:name="P10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Times New Roman"/>
    </style:style>
    <style:style style:name="P103" style:family="paragraph" style:parent-style-name="Text_20_body">
      <style:paragraph-properties fo:margin-left="0cm" fo:text-align="justify" style:justify-single-word="false" fo:orphans="2" fo:widows="2" fo:text-indent="0cm" style:auto-text-indent="false" loext:word-spacing-minimum="75%" loext:word-spacing-maximum="133%"/>
      <style:text-properties style:font-name="Times New Roman" fo:font-size="12pt" style:text-underline-style="solid" style:text-underline-width="auto" style:text-underline-color="font-color" officeooo:paragraph-rsid="001eed2c" style:font-size-asian="12pt" style:font-size-complex="12pt"/>
    </style:style>
    <style:style style:name="P104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Times New Roman" fo:font-size="12pt" style:text-underline-style="none" officeooo:paragraph-rsid="001eed2c" style:font-size-asian="12pt" style:font-size-complex="12pt"/>
    </style:style>
    <style:style style:name="P105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Times New Roman" fo:font-size="22pt" fo:language="ru" fo:country="RU" style:text-underline-style="none" fo:font-weight="bold" officeooo:rsid="00220041" officeooo:paragraph-rsid="00220041" style:font-size-asian="22pt" style:font-weight-asian="bold" style:font-size-complex="22pt" style:font-weight-complex="bold"/>
    </style:style>
    <style:style style:name="P106" style:family="paragraph" style:parent-style-name="Plain_20_Text">
      <style:paragraph-properties fo:margin-left="0cm" fo:text-align="justify" style:justify-single-word="false" fo:orphans="2" fo:widows="2" fo:text-indent="0cm" style:auto-text-indent="false" loext:word-spacing-minimum="75%" loext:word-spacing-maximum="133%"/>
      <style:text-properties style:font-name="Times New Roman" fo:font-size="10pt" fo:language="ru" fo:country="RU" style:text-underline-style="none" fo:font-weight="normal" officeooo:rsid="00220041" officeooo:paragraph-rsid="00220041" style:font-size-asian="10pt" style:font-weight-asian="normal" style:font-size-complex="10pt" style:font-weight-complex="normal"/>
    </style:style>
    <style:style style:name="P107" style:family="paragraph" style:parent-style-name="Plain_20_Text">
      <style:paragraph-properties fo:text-align="justify" style:justify-single-word="false" fo:orphans="2" fo:widows="2" fo:text-indent="1.251cm" style:auto-text-indent="false" loext:word-spacing-minimum="75%" loext:word-spacing-maximum="133%"/>
      <style:text-properties style:font-name="Times New Roman" fo:font-size="10pt" style:text-underline-style="none" officeooo:paragraph-rsid="001eed2c" style:font-size-asian="10pt" style:font-size-complex="10pt"/>
    </style:style>
    <style:style style:name="P108" style:family="paragraph" style:parent-style-name="Plain_20_Text">
      <style:paragraph-properties fo:margin-left="0cm" fo:text-align="justify" style:justify-single-word="false" fo:orphans="2" fo:widows="2" fo:text-indent="0cm" style:auto-text-indent="false" loext:word-spacing-minimum="75%" loext:word-spacing-maximum="133%"/>
      <style:text-properties style:font-name="Times New Roman" fo:font-size="12pt" style:text-underline-style="none" officeooo:paragraph-rsid="001eed2c" style:font-size-asian="12pt" style:font-size-complex="12pt"/>
    </style:style>
    <style:style style:name="P109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officeooo:paragraph-rsid="00269080" style:font-size-asian="12pt"/>
    </style:style>
    <style:style style:name="P110" style:family="paragraph" style:parent-style-name="Quotations">
      <style:paragraph-properties fo:margin-top="0cm" fo:margin-bottom="0.247cm" style:contextual-spacing="false" fo:line-height="115%" fo:text-align="justify" style:justify-single-word="false" loext:word-spacing-minimum="75%" loext:word-spacing-maximum="133%"/>
      <style:text-properties style:font-name="Times New Roman" style:font-size-asian="12pt"/>
    </style:style>
    <style:style style:name="P111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officeooo:paragraph-rsid="00236c47" style:font-size-asian="12pt"/>
    </style:style>
    <style:style style:name="P112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fo:font-weight="bold" officeooo:paragraph-rsid="00236c47" style:font-size-asian="12pt"/>
    </style:style>
    <style:style style:name="P113" style:family="paragraph" style:parent-style-name="Preformatted_20_Text">
      <style:paragraph-properties fo:margin-top="0cm" fo:margin-bottom="0.247cm" style:contextual-spacing="false" fo:line-height="115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114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style:font-size-asian="12pt"/>
    </style:style>
    <style:style style:name="P115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fo:font-weight="bold" officeooo:paragraph-rsid="00270315" style:font-size-asian="12pt"/>
    </style:style>
    <style:style style:name="P116" style:family="paragraph" style:parent-style-name="Text_20_body">
      <style:paragraph-properties fo:text-align="justify" style:justify-single-word="false" loext:word-spacing-minimum="75%" loext:word-spacing-maximum="133%"/>
      <style:text-properties style:font-name="Times New Roman" officeooo:paragraph-rsid="00270315" style:font-size-asian="12pt"/>
    </style:style>
    <style:style style:name="P117" style:family="paragraph" style:parent-style-name="Text_20_body">
      <style:paragraph-properties fo:margin-top="0cm" fo:margin-bottom="0.247cm" style:contextual-spacing="false" fo:line-height="115%" fo:text-align="justify" style:justify-single-word="false" loext:word-spacing-minimum="75%" loext:word-spacing-maximum="133%"/>
      <style:text-properties style:font-name="Times New Roman" fo:font-size="12pt" style:text-underline-style="none" style:font-size-asian="12pt" style:font-size-complex="12pt"/>
    </style:style>
    <style:style style:name="P118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loext:hyphenation-keep-line="false"/>
      <style:text-properties officeooo:paragraph-rsid="002679f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Arial1" fo:font-size="11pt" style:font-name-asian="Arial2" style:font-size-asian="11pt" style:font-name-complex="Arial2" style:font-size-complex="11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fo:font-size="12pt" fo:language="ru" fo:country="RU" style:text-underline-style="solid" style:text-underline-width="auto" style:text-underline-color="font-color" officeooo:rsid="001ee140" style:font-size-asian="12pt" style:font-size-complex="12pt"/>
    </style:style>
    <style:style style:name="T8" style:family="text">
      <style:text-properties fo:font-size="12pt" officeooo:rsid="001ee140" style:font-size-asian="12pt" style:font-size-complex="12pt"/>
    </style:style>
    <style:style style:name="T9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super 58%" fo:font-size="12pt" fo:language="ru" fo:country="RU" fo:font-style="italic" style:font-size-asian="12pt" style:font-style-asian="italic" style:font-size-complex="12pt" style:font-style-complex="italic"/>
    </style:style>
    <style:style style:name="T11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2" style:family="text">
      <style:text-properties fo:language="ru" fo:country="RU"/>
    </style:style>
    <style:style style:name="T1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language="en" fo:country="US" style:font-size-asian="1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text-transform="uppercase" style:font-name="Times New Roman" fo:font-size="12pt" fo:font-weight="bold" style:font-size-asian="12pt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/>
    </style:style>
    <style:style style:name="T21" style:family="text">
      <style:text-properties style:font-name="Times New Roman" fo:font-size="12pt" fo:font-weight="bold" style:font-size-asian="12pt" style:font-weight-asian="bold" style:font-weight-complex="bold"/>
    </style:style>
    <style:style style:name="T22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color="#000000" loext:opacity="100%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fo:color="#2e75b5" loext:opacity="100%" fo:language="ru" fo:country="RU" fo:font-weight="bold" style:font-weight-asian="bold" style:font-weight-complex="bold"/>
    </style:style>
    <style:style style:name="T29" style:family="text">
      <style:text-properties fo:language="ru" fo:country="RU" style:font-name-asian="Arial2"/>
    </style:style>
    <style:style style:name="T30" style:family="text">
      <style:text-properties fo:language="en" fo:country="US" style:font-name-asian="Arial2"/>
    </style:style>
    <style:style style:name="T31" style:family="text">
      <style:text-properties fo:text-transform="uppercase" fo:color="#000000" loext:opacity="100%" fo:font-size="9.5pt" fo:font-weight="bold" style:font-size-asian="9.5pt" style:font-weight-asian="bold" style:font-size-complex="9.5pt" style:font-weight-complex="bold"/>
    </style:style>
    <style:style style:name="T32" style:family="text">
      <style:text-properties fo:color="#000000" loext:opacity="100%" fo:font-size="10pt" style:font-size-asian="10pt" style:font-size-complex="10pt"/>
    </style:style>
    <style:style style:name="T3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000000" loext:opacity="100%" fo:font-size="10pt" fo:letter-spacing="0.039cm" fo:font-weight="bold" style:font-size-asian="10pt" style:font-weight-asian="bold" style:font-size-complex="10pt" style:font-weight-complex="bold"/>
    </style:style>
    <style:style style:name="T35" style:family="text">
      <style:text-properties fo:color="#000000" loext:opacity="100%" fo:font-size="10pt" style:font-name-asian="Calibri1" style:font-size-asian="10pt" style:font-size-complex="10pt"/>
    </style:style>
    <style:style style:name="T36" style:family="text">
      <style:text-properties fo:color="#000000" loext:opacity="100%" fo:font-size="13pt" fo:language="ru" fo:country="RU" fo:font-weight="bold" style:font-size-asian="13pt" style:font-weight-asian="bold" style:font-size-complex="13pt" style:font-weight-complex="bold"/>
    </style:style>
    <style:style style:name="T37" style:family="text">
      <style:text-properties fo:color="#000000" loext:opacity="100%" fo:font-size="13pt" fo:language="ru" fo:country="RU" style:font-size-asian="13pt" style:font-size-complex="13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000000" loext:opacity="100%" fo:language="ru" fo:country="RU" fo:font-weight="bold" style:font-weight-asian="bold" style:font-weight-complex="bold"/>
    </style:style>
    <style:style style:name="T40" style:family="text">
      <style:text-properties fo:color="#000000" loext:opacity="100%" fo:language="ru" fo:country="RU" officeooo:rsid="001ee140"/>
    </style:style>
    <style:style style:name="T41" style:family="text">
      <style:text-properties fo:color="#000000" loext:opacity="100%" fo:letter-spacing="0.002cm" style:text-scale="99%"/>
    </style:style>
    <style:style style:name="T42" style:family="text">
      <style:text-properties fo:color="#000000" loext:opacity="100%" fo:letter-spacing="0.002cm" fo:language="ru" fo:country="RU" style:text-scale="99%"/>
    </style:style>
    <style:style style:name="T43" style:family="text">
      <style:text-properties fo:color="#000000" loext:opacity="100%" fo:letter-spacing="0.002cm" officeooo:rsid="001ee140" style:text-scale="99%"/>
    </style:style>
    <style:style style:name="T44" style:family="text">
      <style:text-properties style:font-name-asian="Arial2"/>
    </style:style>
    <style:style style:name="T45" style:family="text">
      <style:text-properties fo:font-size="12pt" fo:language="ru" fo:country="RU" fo:font-weight="bold" style:font-name-asian="Arial2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name-asian="Arial2" style:font-size-asian="12pt" style:font-size-complex="12pt"/>
    </style:style>
    <style:style style:name="T47" style:family="text">
      <style:text-properties fo:font-size="12pt" fo:language="ru" fo:country="RU" style:text-underline-style="solid" style:text-underline-width="auto" style:text-underline-color="font-color" style:font-name-asian="Arial2" style:font-size-asian="12pt" style:font-size-complex="12pt"/>
    </style:style>
    <style:style style:name="T48" style:family="text">
      <style:text-properties fo:font-size="12pt" fo:language="en" fo:country="US" style:font-name-asian="Arial2" style:font-size-asian="12pt" style:font-size-complex="12pt"/>
    </style:style>
    <style:style style:name="T49" style:family="text">
      <style:text-properties style:font-name="Times New Roman" fo:font-size="22pt" fo:language="ru" fo:country="RU" style:font-name-asian="Arial2" style:font-size-asian="19.25pt" style:font-size-complex="22pt"/>
    </style:style>
    <style:style style:name="T50" style:family="text">
      <style:text-properties style:font-name="Times New Roman" fo:font-size="22pt" fo:font-weight="bold" officeooo:rsid="001eed2c" style:font-size-asian="19.25pt" style:font-weight-asian="bold" style:font-size-complex="22pt" style:font-weight-complex="bold"/>
    </style:style>
    <style:style style:name="T51" style:family="text">
      <style:text-properties fo:language="en" fo:country="US"/>
    </style:style>
    <style:style style:name="T52" style:family="text"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T53" style:family="text">
      <style:text-properties fo:font-weight="bold"/>
    </style:style>
    <style:style style:name="T54" style:family="text">
      <style:text-properties style:font-name="Google Sans Text" style:text-underline-style="none" fo:font-weight="bold"/>
    </style:style>
    <style:style style:name="T55" style:family="text">
      <style:text-properties style:font-name="Google Sans Text" style:text-underline-style="none"/>
    </style:style>
    <style:style style:name="T56" style:family="text">
      <style:text-properties style:font-name="Google Sans Text"/>
    </style:style>
    <style:style style:name="T57" style:family="text">
      <style:text-properties style:font-name="Times New Roman" fo:font-size="18pt" style:text-underline-style="none" style:font-size-asian="18pt" style:font-size-complex="18pt"/>
    </style:style>
    <style:style style:name="T58" style:family="text">
      <style:text-properties style:font-name="Times New Roman" style:text-underline-style="none" fo:font-weight="bold"/>
    </style:style>
    <style:style style:name="T59" style:family="text">
      <style:text-properties style:font-name="Times New Roman" style:text-underline-style="none"/>
    </style:style>
    <style:style style:name="T60" style:family="text">
      <style:text-properties style:font-name="Times New Roman" fo:font-size="12pt" fo:language="ru" fo:country="RU" style:font-size-asian="12pt"/>
    </style:style>
    <style:style style:name="T61" style:family="text">
      <style:text-properties officeooo:rsid="00201103"/>
    </style:style>
    <style:style style:name="T62" style:family="text">
      <style:text-properties style:font-name="Times New Roman" fo:font-size="12pt" style:text-underline-style="none" style:font-size-asian="12pt"/>
    </style:style>
    <style:style style:name="T63" style:family="text">
      <style:text-properties officeooo:rsid="00269080"/>
    </style:style>
    <style:style style:name="T64" style:family="text">
      <style:text-properties officeooo:rsid="00236c47"/>
    </style:style>
    <style:style style:name="T65" style:family="text">
      <style:text-properties style:font-name="Times New Roman" fo:font-weight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643cm, 0cm, 67.4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5.981cm, 0cm, -0.0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ffffff" svg:stroke-linecap="butt" draw:fill="solid" draw:fill-color="#ffffff" draw:textarea-vertical-align="top" draw:auto-grow-height="false" fo:min-height="0.873cm" fo:min-width="0.813cm" fo:padding-top="0.125cm" fo:padding-bottom="0.125cm" fo:padding-left="0.25cm" fo:padding-right="0.25cm" fo:wrap-option="wrap" loext:decorative="false" fo:margin-left="0cm" fo:margin-right="0.064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2" style:family="graphic">
      <style:graphic-properties draw:fill-color="#cccccc" draw:textarea-horizontal-align="justify" draw:textarea-vertical-align="middle" draw:auto-grow-height="false" fo:min-height="0.979cm" fo:min-width="0.9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804cm" fo:min-width="5.10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2" loext:marker-style-name="T2"><text:span text:style-name="T2">ФЕДЕРАЛЬНОЕ ГОСУДАРСТВЕННОЕ АВТОНОМНОЕ ОБРАЗОВАТЕЛЬНОЕ УЧРЕЖДЕНИЕ ВЫСШЕГО ОБРАЗОВАНИЯ</text:span></text:p>
            <text:p text:style-name="P2" loext:marker-style-name="T2"><text:span text:style-name="T2"><text:s/>«МОСКОВСКИЙ АВИАЦИОННЫЙ ИНСТИТУТ</text:span></text:p>
            <text:p text:style-name="P2" loext:marker-style-name="T2"><text:span text:style-name="T2">(НАЦИОНАЛЬНЫЙ ИССЛЕДОВАТЕЛЬСКИЙ УНИВЕРСИТЕТ)»</text:span></text:p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4" loext:marker-style-name="T2"/>
            <text:p text:style-name="P4" loext:marker-style-name="T2"/>
            <text:p text:style-name="P4" loext:marker-style-name="T2"/>
            <text:p text:style-name="P4" loext:marker-style-name="T2"/>
            <text:p text:style-name="P4" loext:marker-style-name="T2"/>
            <text:p text:style-name="P4" loext:marker-style-name="T2"/>
            <text:p text:style-name="P4" loext:marker-style-name="T2"/>
            <text:p text:style-name="P4" loext:marker-style-name="T2"/>
            <text:p text:style-name="P5" loext:marker-style-name="T3"><text:span text:style-name="T3">Журнал практики</text:span></text:p>
            <text:p text:style-name="P4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6" loext:marker-style-name="T4"><text:span text:style-name="T4">Институт № </text:span><text:span text:style-name="T5">3</text:span><text:span text:style-name="T4">_</text:span></text:p>
          </table:table-cell>
          <table:table-cell table:style-name="Таблица1.A1" table:number-columns-spanned="4" office:value-type="string">
            <text:p text:style-name="P7" loext:marker-style-name="T4"><text:span text:style-name="T4">«_</text:span><text:span text:style-name="T5">Системы управления, информатика и электроэнергетика</text:span><text:span text:style-name="T4">__»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8" loext:marker-style-name="T4"/>
          </table:table-cell>
          <table:table-cell table:style-name="Таблица1.A1" table:number-columns-spanned="4" office:value-type="string">
            <text:p text:style-name="P9" loext:marker-style-name="T4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6" loext:marker-style-name="T4"><text:span text:style-name="T4">Кафедра </text:span></text:p>
          </table:table-cell>
          <table:table-cell table:style-name="Таблица1.A1" table:number-columns-spanned="2" office:value-type="string">
            <text:p text:style-name="P7" loext:marker-style-name="T4"><text:span text:style-name="T4">_______</text:span><text:span text:style-name="T5">304</text:span><text:span text:style-name="T4">_____</text:span></text:p>
          </table:table-cell>
          <table:covered-table-cell/>
          <table:table-cell table:style-name="Таблица1.A1" office:value-type="string">
            <text:p text:style-name="P7" loext:marker-style-name="T4"><text:span text:style-name="T4">Учебная группа </text:span></text:p>
          </table:table-cell>
          <table:table-cell table:style-name="Таблица1.A1" office:value-type="string">
            <text:p text:style-name="P7" loext:marker-style-name="T4"><text:span text:style-name="T4">_</text:span><text:span text:style-name="T5">М30-11</text:span><text:span text:style-name="T5">1</text:span><text:span text:style-name="T5">БВ-25</text:span><text:span text:style-name="T4">__</text:span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4"/>
          </table:table-cell>
          <table:table-cell table:style-name="Таблица1.A1" table:number-columns-spanned="2" office:value-type="string">
            <text:p text:style-name="P9" loext:marker-style-name="T4"/>
          </table:table-cell>
          <table:covered-table-cell/>
          <table:table-cell table:style-name="Таблица1.A1" office:value-type="string">
            <text:p text:style-name="P9" loext:marker-style-name="T4"/>
          </table:table-cell>
          <table:table-cell table:style-name="Таблица1.A1" office:value-type="string">
            <text:p text:style-name="P9" loext:marker-style-name="T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7" loext:marker-style-name="T4"><text:span text:style-name="T4">ФИО обучающегося</text:span></text:p>
          </table:table-cell>
          <table:covered-table-cell/>
          <table:table-cell table:style-name="Таблица1.A1" table:number-columns-spanned="3" office:value-type="string">
            <text:p text:style-name="P10" loext:marker-style-name="T6"><text:span text:style-name="T4">____</text:span><text:span text:style-name="T7">Ковалев Святослав Александрович</text:span><text:span text:style-name="T4">__________</text:span><text:span text:style-name="T8">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 loext:marker-style-name="T4"/>
          </table:table-cell>
          <table:covered-table-cell/>
          <table:table-cell table:style-name="Таблица1.A1" table:number-columns-spanned="3" office:value-type="string">
            <text:p text:style-name="P11" loext:marker-style-name="T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7" loext:marker-style-name="T4"><text:span text:style-name="T4">Направление подготовки/</text:span></text:p>
            <text:p text:style-name="P7" loext:marker-style-name="T4"><text:span text:style-name="T4">специальность</text:span></text:p>
          </table:table-cell>
          <table:covered-table-cell/>
          <table:table-cell table:style-name="Таблица1.A1" table:number-columns-spanned="3" office:value-type="string">
            <text:p text:style-name="P7" loext:marker-style-name="T4"><text:span text:style-name="T4">_____</text:span><text:span text:style-name="T5">09.03.0</text:span><text:span text:style-name="T5">4</text:span><text:span text:style-name="T4">___________________________________________</text:span><text:span text:style-name="T5">Программная инженерия</text:span><text:span text:style-name="T4">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 loext:marker-style-name="T4"/>
          </table:table-cell>
          <table:covered-table-cell/>
          <table:table-cell table:style-name="Таблица1.A1" table:number-columns-spanned="3" office:value-type="string">
            <text:p text:style-name="P5" loext:marker-style-name="T9"><text:span text:style-name="T9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 loext:marker-style-name="T4"/>
          </table:table-cell>
          <table:covered-table-cell/>
          <table:table-cell table:style-name="Таблица1.A1" table:number-columns-spanned="3" office:value-type="string">
            <text:p text:style-name="P12" loext:marker-style-name="T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7" loext:marker-style-name="T4"><text:span text:style-name="T4">Вид практики</text:span></text:p>
          </table:table-cell>
          <table:covered-table-cell/>
          <table:table-cell table:style-name="Таблица1.A1" table:number-columns-spanned="3" office:value-type="string">
            <text:p text:style-name="P7" loext:marker-style-name="T4"><text:span text:style-name="T4">______</text:span><text:span text:style-name="T5">ознакомительная</text:span><text:span text:style-name="T4">____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 loext:marker-style-name="T4"/>
          </table:table-cell>
          <table:covered-table-cell/>
          <table:table-cell table:style-name="Таблица1.A1" table:number-columns-spanned="3" office:value-type="string">
            <text:p text:style-name="P5" loext:marker-style-name="T9"><text:span text:style-name="T9">учебная, производственна</text:span><text:span text:style-name="T10"> <text:s/></text:span><text:span text:style-name="T9">я, преддипломная или другой вид практик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7" loext:marker-style-name="T4"><text:span text:style-name="T4">Оценка за практику</text:span></text:p>
          </table:table-cell>
          <table:covered-table-cell/>
          <table:table-cell table:style-name="Таблица1.A1" table:number-columns-spanned="3" office:value-type="string">
            <text:p text:style-name="P13" loext:marker-style-name="T11"><text:span text:style-name="T4">_________________ </text:span><text:span text:style-name="T5">Максимов Е.Д.</text:span><text:span text:style-name="T11">____________________</text:span></text:p>
          </table:table-cell>
          <table:covered-table-cell/>
          <table:covered-table-cell/>
        </table:table-row>
      </table:table>
      <text:p text:style-name="P14"/>
      <text:p text:style-name="P15"/>
      <text:p text:style-name="P16"/>
      <text:p text:style-name="P16"/>
      <text:p text:style-name="P16"/>
      <text:p text:style-name="P16"/>
      <text:p text:style-name="P16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list text:style-name="WWNum1">
              <text:list-item>
                <text:p text:style-name="P18" loext:marker-style-name="T13"><text:span text:style-name="T2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7" loext:marker-style-name="T4"><text:span text:style-name="T4">Наименование организации:</text:span></text:p>
          </table:table-cell>
          <table:table-cell table:style-name="Таблица2.A1" table:number-columns-spanned="2" office:value-type="string">
            <text:p text:style-name="P10" loext:marker-style-name="T4"><text:span text:style-name="T4">_</text:span><text:span text:style-name="T5">Федеральное государственное автономное образовательное учреждение высшего образования «Московский авиационный институт (национальный исследовательский университет)»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7" loext:marker-style-name="T4"><text:span text:style-name="T4">Сроки проведения практики</text:span></text:p>
          </table:table-cell>
          <table:table-cell table:style-name="Таблица2.A1" table:number-columns-spanned="2" office:value-type="string">
            <text:p text:style-name="P11" loext:marker-style-name="T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7" loext:marker-style-name="T4"><text:span text:style-name="T4">дата начала практики:</text:span></text:p>
          </table:table-cell>
          <table:table-cell table:style-name="Таблица2.A1" table:number-columns-spanned="2" office:value-type="string">
            <text:p text:style-name="P10" loext:marker-style-name="T4"><text:span text:style-name="T4">_________</text:span><text:span text:style-name="T5">09.02.2026</text:span><text:span text:style-name="T4">____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7" loext:marker-style-name="T4"><text:span text:style-name="T4">дата окончания практики:</text:span></text:p>
          </table:table-cell>
          <table:table-cell table:style-name="Таблица2.A1" table:number-columns-spanned="2" office:value-type="string">
            <text:p text:style-name="P10" loext:marker-style-name="T4"><text:span text:style-name="T4">_________</text:span><text:span text:style-name="T5">06.06.2026</text:span><text:span text:style-name="T4">_____________________________</text:span>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1">
              <text:list-item>
                <text:p text:style-name="P18" loext:marker-style-name="T13"><text:span text:style-name="T2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7" loext:marker-style-name="T4"><text:span text:style-name="T4">__________________________</text:span></text:p>
          </table:table-cell>
          <table:table-cell table:style-name="Таблица2.A1" office:value-type="string">
            <text:p text:style-name="P5" loext:marker-style-name="T4"><text:span text:style-name="T4">/__</text:span><text:span text:style-name="T5">Е.Д.Максимов</text:span><text:span text:style-name="T4">__/</text:span></text:p>
          </table:table-cell>
          <table:table-cell table:style-name="Таблица2.A1" office:value-type="string">
            <text:p text:style-name="P5" loext:marker-style-name="T4"><text:span text:style-name="T4">_</text:span><text:span text:style-name="T5">09</text:span><text:span text:style-name="T4">__ _</text:span><text:span text:style-name="T5">февраля</text:span><text:span text:style-name="T4">_ 20</text:span><text:span text:style-name="T5">26</text:span><text:span text:style-name="T4">г.</text:span></text:p>
          </table:table-cell>
        </table:table-row>
        <table:table-row table:style-name="Таблица2.1">
          <table:table-cell table:style-name="Таблица2.A1" office:value-type="string">
            <text:p text:style-name="P5" loext:marker-style-name="T9"><text:span text:style-name="T9">подпись проводившего</text:span></text:p>
          </table:table-cell>
          <table:table-cell table:style-name="Таблица2.A1" office:value-type="string">
            <text:p text:style-name="P5" loext:marker-style-name="T9"><text:span text:style-name="T9">расшифровка подписи</text:span></text:p>
          </table:table-cell>
          <table:table-cell table:style-name="Таблица2.A1" office:value-type="string">
            <text:p text:style-name="P5" loext:marker-style-name="T9"><text:span text:style-name="T9">дата проведения</text:span></text:p>
          </table:table-cell>
        </table:table-row>
        <text:soft-page-break/>
        <table:table-row table:style-name="Таблица2.9">
          <table:table-cell table:style-name="Таблица2.A1" table:number-columns-spanned="3" office:value-type="string">
            <text:list text:continue-numbering="true" text:style-name="WWNum1">
              <text:list-item>
                <text:p text:style-name="P18" loext:marker-style-name="T13"><text:span text:style-name="T2">Индивидуальное задание обучающегося:</text:span></text:p>
              </text:list-item>
            </text:list>
          </table:table-cell>
          <table:covered-table-cell/>
          <table:covered-table-cell/>
        </table:table-row>
        <table:table-row table:style-name="Таблица2.10">
          <table:table-cell table:style-name="Таблица2.A1" table:number-columns-spanned="3" office:value-type="string">
            <text:p text:style-name="P19" loext:marker-style-name="T14"/>
            <text:p text:style-name="P20"/>
            <text:p text:style-name="P21" loext:marker-style-name="T15"/>
            <text:p text:style-name="P22" loext:marker-style-name="T15"><text:s text:c="9"/><text:span text:style-name="T15"><text:s/>Кафедра 304 </text:span><text:s text:c="42"/><text:span text:style-name="T15">Курс: <text:s/>ПРОГРАММИРОВАНИЕ <text:s text:c="5"/></text:span><text:span text:style-name="T16">II</text:span><text:span text:style-name="T15"> <text:s/>семестр</text:span></text:p>
            <text:p text:style-name="P22" loext:marker-style-name="T17"><text:span text:style-name="T17"><text:s text:c="8"/>Практика</text:span></text:p>
            <text:p text:style-name="P20"/>
            <text:p text:style-name="P23" loext:marker-style-name="T15"/>
            <text:p text:style-name="P24" loext:marker-style-name="T18"><text:span text:style-name="T18">Вариант № 12</text:span></text:p>
            <text:p text:style-name="P25" loext:marker-style-name="T19"/>
            <text:p text:style-name="P26" loext:marker-style-name="T20"><text:span text:style-name="T20"><text:s text:c="4"/>В зоне действия АСУ ВД имеется <text:s/>3 <text:s/>аэродрома с номерами <text:s/>1, 2, 3. В процессе функционирования данные о самолетах, совершающих <text:s text:c="2"/>посадку, фиксируются в файле, каждая запись которого имеет структуру типа:</text:span></text:p>
            <text:p text:style-name="P27" loext:marker-style-name="T20"/>
            <text:p text:style-name="P26" loext:marker-style-name="T21"><text:span text:style-name="T21"><text:s text:c="4"/>11:15 <text:s text:c="7"/>ТУ-154М <text:s text:c="7"/>Б-3726 <text:s text:c="8"/>АП2</text:span></text:p>
            <text:p text:style-name="P26" loext:marker-style-name="T20"><text:span text:style-name="T20"><text:s text:c="4"/>время <text:s text:c="7"/>марка <text:s/>ЛА <text:s text:c="5"/>бортовой <text:s text:c="6"/>аэродром</text:span></text:p>
            <text:p text:style-name="P26" loext:marker-style-name="T20"><text:span text:style-name="T20"><text:s text:c="4"/>посадки <text:s text:c="20"/>номер <text:s text:c="9"/>посадки</text:span></text:p>
            <text:p text:style-name="P27" loext:marker-style-name="T20"/>
            <text:p text:style-name="P26" loext:marker-style-name="T20"><text:span text:style-name="T20"><text:s/>1) подготовить программу, осуществляющую печать таблицы <text:s/>о <text:s/>самолетах совершающих посадку на каждом аэродроме в порядке убывания времени посадки (использовать индексную сортировку методом «пузырька»);</text:span></text:p>
            <text:p text:style-name="P26" loext:marker-style-name="T20"><text:span text:style-name="T20"><text:s/>2) обеспечить входной контроль времени посадки, бортового номера и аэродрома посадки, выполнить отладку и тестирование.</text:span></text:p>
            <text:p text:style-name="P28" loext:marker-style-name="T20"><text:span text:style-name="T20">Чтение данных их файла производить с использованием функций ввода/вывода языка С++.</text:span></text:p>
            <text:p text:style-name="P28" loext:marker-style-name="T20"><text:span text:style-name="T22">Алгоритм должен быть параметризован; обмен данными с подпрограммой должен осуществляться только через параметры; <text:s/>исходные <text:s/>данные <text:s/>хранятся в отдельном файле.</text:span></text:p>
            <text:p text:style-name="P29" loext:marker-style-name="T11"/>
          </table:table-cell>
          <table:covered-table-cell/>
          <table:covered-table-cell/>
        </table:table-row>
      </table:table>
      <text:p text:style-name="P30" loext:marker-style-name="T1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p text:style-name="P31" loext:marker-style-name="T23"/>
            <text:list text:continue-numbering="true" text:style-name="WWNum1">
              <text:list-item>
                <text:p text:style-name="P18" loext:marker-style-name="T13"><text:span text:style-name="T2">План выполнения индивидуального задания обучающегося:</text:span></text:p>
              </text:list-item>
            </text:list>
          </table:table-cell>
        </table:table-row>
      </table:table>
      <text:p text:style-name="P32" loext:marker-style-name="T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 loext:marker-style-name="T2"><text:span text:style-name="T2">№ п/п</text:span></text:p>
          </table:table-cell>
          <table:table-cell table:style-name="Таблица4.A1" office:value-type="string">
            <text:p text:style-name="P34" loext:marker-style-name="T2"><text:span text:style-name="T2">Место проведения</text:span></text:p>
          </table:table-cell>
          <table:table-cell table:style-name="Таблица4.A1" office:value-type="string">
            <text:p text:style-name="P35" loext:marker-style-name="T2"><text:span text:style-name="T2">Тема</text:span></text:p>
          </table:table-cell>
          <table:table-cell table:style-name="Таблица4.A1" office:value-type="string">
            <text:p text:style-name="P33" loext:marker-style-name="T2"><text:span text:style-name="T2">Период выполнения</text:span></text:p>
          </table:table-cell>
        </table:table-row>
        <text:soft-page-break/>
        <table:table-row table:style-name="Таблица4.2">
          <table:table-cell table:style-name="Таблица4.A1" office:value-type="string">
            <text:p text:style-name="P36" loext:marker-style-name="T4"><text:span text:style-name="T4">1</text:span></text:p>
          </table:table-cell>
          <table:table-cell table:style-name="Таблица4.A1" office:value-type="string">
            <text:p text:style-name="P33" loext:marker-style-name="T4"><text:span text:style-name="T4">МАИ</text:span></text:p>
          </table:table-cell>
          <table:table-cell table:style-name="Таблица4.C2" office:value-type="string">
            <text:p text:style-name="P37" loext:marker-style-name="T4"><text:span text:style-name="T4">Вводное занятие и инструктаж по технике безопасности</text:span></text:p>
          </table:table-cell>
          <table:table-cell table:style-name="Таблица4.A1" office:value-type="string">
            <text:p text:style-name="P36" loext:marker-style-name="T4"><text:span text:style-name="T4">09.02.2026</text:span></text:p>
          </table:table-cell>
        </table:table-row>
        <table:table-row table:style-name="Таблица4.3">
          <table:table-cell table:style-name="Таблица4.A1" office:value-type="string">
            <text:p text:style-name="P36" loext:marker-style-name="T4"><text:span text:style-name="T4">2</text:span></text:p>
          </table:table-cell>
          <table:table-cell table:style-name="Таблица4.A1" office:value-type="string">
            <text:p text:style-name="P38" loext:marker-style-name="T4"/>
          </table:table-cell>
          <table:table-cell table:style-name="Таблица4.C3" office:value-type="string">
            <text:p text:style-name="P37" loext:marker-style-name="T4"><text:span text:style-name="T4">Разработка части кода ПО по тестированию исходных данных</text:span></text:p>
          </table:table-cell>
          <table:table-cell table:style-name="Таблица4.A1" office:value-type="string">
            <text:p text:style-name="P36" loext:marker-style-name="T4"><text:span text:style-name="T4">19.02.2026</text:span></text:p>
          </table:table-cell>
        </table:table-row>
        <table:table-row table:style-name="Таблица4.4">
          <table:table-cell table:style-name="Таблица4.A1" office:value-type="string">
            <text:p text:style-name="P36" loext:marker-style-name="T4"><text:span text:style-name="T4">3</text:span></text:p>
          </table:table-cell>
          <table:table-cell table:style-name="Таблица4.A1" office:value-type="string">
            <text:p text:style-name="P38" loext:marker-style-name="T4"/>
          </table:table-cell>
          <table:table-cell table:style-name="Таблица4.C4" office:value-type="string">
            <text:p text:style-name="P37" loext:marker-style-name="T4"><text:span text:style-name="T4">Контрольная встреча с руководителем практики для обсуждения программы</text:span></text:p>
          </table:table-cell>
          <table:table-cell table:style-name="Таблица4.A1" office:value-type="string">
            <text:p text:style-name="P36" loext:marker-style-name="T4"><text:span text:style-name="T4">26.02.2026</text:span></text:p>
          </table:table-cell>
        </table:table-row>
        <table:table-row table:style-name="Таблица4.5">
          <table:table-cell table:style-name="Таблица4.A1" office:value-type="string">
            <text:p text:style-name="P36" loext:marker-style-name="T4"><text:span text:style-name="T4">4</text:span></text:p>
          </table:table-cell>
          <table:table-cell table:style-name="Таблица4.A1" office:value-type="string">
            <text:p text:style-name="P38" loext:marker-style-name="T4"/>
          </table:table-cell>
          <table:table-cell table:style-name="Таблица4.C5" office:value-type="string">
            <text:p text:style-name="P37" loext:marker-style-name="T4"><text:span text:style-name="T4">Контрольная встреча с руководителем практики для обсуждения программы</text:span></text:p>
          </table:table-cell>
          <table:table-cell table:style-name="Таблица4.A1" office:value-type="string">
            <text:p text:style-name="P36" loext:marker-style-name="T4"><text:span text:style-name="T4">19.03.2026</text:span></text:p>
          </table:table-cell>
        </table:table-row>
        <table:table-row table:style-name="Таблица4.6">
          <table:table-cell table:style-name="Таблица4.A6" office:value-type="string">
            <text:p text:style-name="P36" loext:marker-style-name="T4"><text:span text:style-name="T4">5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6" office:value-type="string">
            <text:p text:style-name="P39" loext:marker-style-name="T24"><text:span text:style-name="T4">Разработка части кода ПО, <text:s/>сортирующую записи с использованием индексной сортировки</text:span></text:p>
          </table:table-cell>
          <table:table-cell table:style-name="Таблица4.A6" office:value-type="string">
            <text:p text:style-name="P36" loext:marker-style-name="T4"><text:span text:style-name="T4">26.03.2026</text:span></text:p>
          </table:table-cell>
        </table:table-row>
        <table:table-row table:style-name="Таблица4.7">
          <table:table-cell table:style-name="Таблица4.A6" office:value-type="string">
            <text:p text:style-name="P36" loext:marker-style-name="T4"><text:span text:style-name="T4">6</text:span></text:p>
          </table:table-cell>
          <table:table-cell table:style-name="Таблица4.A6" office:value-type="string">
            <text:p text:style-name="P40" loext:marker-style-name="T4"/>
          </table:table-cell>
          <table:table-cell table:style-name="Таблица4.C7" office:value-type="string">
            <text:p text:style-name="P37" loext:marker-style-name="T25"><text:bookmark text:name="_hl1zdbbxcuc5"/><text:span text:style-name="T4">Контрольная встреча с руководителем практики для обсуждения программы</text:span></text:p>
          </table:table-cell>
          <table:table-cell table:style-name="Таблица4.A6" office:value-type="string">
            <text:p text:style-name="P36" loext:marker-style-name="T4"><text:span text:style-name="T4">09.04.2026</text:span></text:p>
          </table:table-cell>
        </table:table-row>
        <table:table-row table:style-name="Таблица4.8">
          <table:table-cell table:style-name="Таблица4.A6" office:value-type="string">
            <text:p text:style-name="P36" loext:marker-style-name="T4"><text:span text:style-name="T4">7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8" office:value-type="string">
            <text:p text:style-name="P39" loext:marker-style-name="T24"><text:span text:style-name="T4">Контрольная встреча с руководителем практики для обсуждения программы</text:span></text:p>
          </table:table-cell>
          <table:table-cell table:style-name="Таблица4.A6" office:value-type="string">
            <text:p text:style-name="P36" loext:marker-style-name="T4"><text:span text:style-name="T4">23.04.2026</text:span></text:p>
          </table:table-cell>
        </table:table-row>
        <table:table-row table:style-name="Таблица4.9">
          <table:table-cell table:style-name="Таблица4.A6" office:value-type="string">
            <text:p text:style-name="P36" loext:marker-style-name="T4"><text:span text:style-name="T4">8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9" office:value-type="string">
            <text:p text:style-name="P37"><text:span text:style-name="T4">Контрольная встреча с руководителем практики для обсуждения программы</text:span></text:p>
          </table:table-cell>
          <table:table-cell table:style-name="Таблица4.A6" office:value-type="string">
            <text:p text:style-name="P36" loext:marker-style-name="T4"><text:span text:style-name="T4">14.05.2026</text:span></text:p>
          </table:table-cell>
        </table:table-row>
        <table:table-row table:style-name="Таблица4.10">
          <table:table-cell table:style-name="Таблица4.A6" office:value-type="string">
            <text:p text:style-name="P36" loext:marker-style-name="T4"><text:span text:style-name="T4">9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10" office:value-type="string">
            <text:p text:style-name="P37"><text:span text:style-name="T4">Подготовка отчета</text:span></text:p>
          </table:table-cell>
          <table:table-cell table:style-name="Таблица4.A6" office:value-type="string">
            <text:p text:style-name="P36" loext:marker-style-name="T4"><text:span text:style-name="T4">28.05.2026</text:span></text:p>
          </table:table-cell>
        </table:table-row>
        <table:table-row table:style-name="Таблица4.11">
          <table:table-cell table:style-name="Таблица4.A6" office:value-type="string">
            <text:p text:style-name="P36" loext:marker-style-name="T4"><text:span text:style-name="T4">10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11" office:value-type="string">
            <text:p text:style-name="P37" loext:marker-style-name="T4"><text:span text:style-name="T4">Контрольная встреча с руководителем практики для обсуждения отчета</text:span></text:p>
          </table:table-cell>
          <table:table-cell table:style-name="Таблица4.A6" office:value-type="string">
            <text:p text:style-name="P36" loext:marker-style-name="T4"><text:span text:style-name="T4">03.06.2026</text:span></text:p>
          </table:table-cell>
        </table:table-row>
        <table:table-row table:style-name="Таблица4.12">
          <table:table-cell table:style-name="Таблица4.A6" office:value-type="string">
            <text:p text:style-name="P36" loext:marker-style-name="T4"><text:span text:style-name="T4">11</text:span></text:p>
          </table:table-cell>
          <table:table-cell table:style-name="Таблица4.A6" office:value-type="string">
            <text:p text:style-name="P38" loext:marker-style-name="T4"/>
          </table:table-cell>
          <table:table-cell table:style-name="Таблица4.C12" office:value-type="string">
            <text:p text:style-name="P37" loext:marker-style-name="T4"><text:span text:style-name="T4">Сдача отчетов</text:span></text:p>
          </table:table-cell>
          <table:table-cell table:style-name="Таблица4.A6" office:value-type="string">
            <text:p text:style-name="P36" loext:marker-style-name="T4"><text:span text:style-name="T4">06.06.2026</text:span></text:p>
          </table:table-cell>
        </table:table-row>
      </table:table>
      <text:p text:style-name="P41" loext:marker-style-name="T2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42" loext:marker-style-name="T2"><text:span text:style-name="T2">Утверждаю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7" loext:marker-style-name="T4"><text:span text:style-name="T4">__________________________</text:span></text:p>
          </table:table-cell>
          <table:table-cell table:style-name="Таблица5.A1" office:value-type="string">
            <text:p text:style-name="P5" loext:marker-style-name="T4"><text:span text:style-name="T4">/__</text:span><text:span text:style-name="T5">Е.Д. Максимов</text:span><text:span text:style-name="T4">__/</text:span></text:p>
          </table:table-cell>
          <table:table-cell table:style-name="Таблица5.A1" office:value-type="string">
            <text:p text:style-name="P5" loext:marker-style-name="T4"><text:span text:style-name="T4">_</text:span><text:span text:style-name="T5">09</text:span><text:span text:style-name="T4">_ _</text:span><text:span text:style-name="T5">февраля</text:span><text:span text:style-name="T4">_ 20</text:span><text:span text:style-name="T5">26</text:span><text:span text:style-name="T4">г.</text:span></text:p>
          </table:table-cell>
        </table:table-row>
        <table:table-row table:style-name="Таблица5.1">
          <table:table-cell table:style-name="Таблица5.A1" office:value-type="string">
            <text:p text:style-name="P5" loext:marker-style-name="T9"><text:span text:style-name="T9">подпись руководителя от МАИ</text:span></text:p>
          </table:table-cell>
          <table:table-cell table:style-name="Таблица5.A1" office:value-type="string">
            <text:p text:style-name="P5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5" loext:marker-style-name="T9"><text:span text:style-name="T9">дата утверждения*</text:span></text:p>
          </table:table-cell>
        </table:table-row>
        <table:table-row table:style-name="Таблица5.1">
          <table:table-cell table:style-name="Таблица5.A1" office:value-type="string">
            <text:p text:style-name="P9" loext:marker-style-name="T4"/>
          </table:table-cell>
          <table:table-cell table:style-name="Таблица5.A1" office:value-type="string">
            <text:p text:style-name="P43" loext:marker-style-name="T4"/>
          </table:table-cell>
          <table:table-cell table:style-name="Таблица5.A1" office:value-type="string">
            <text:p text:style-name="P43" loext:marker-style-name="T4"/>
          </table:table-cell>
        </table:table-row>
        <table:table-row table:style-name="Таблица5.1">
          <table:table-cell table:style-name="Таблица5.A1" office:value-type="string">
            <text:p text:style-name="P44" loext:marker-style-name="T9"/>
          </table:table-cell>
          <table:table-cell table:style-name="Таблица5.A1" office:value-type="string">
            <text:p text:style-name="P12" loext:marker-style-name="T9"/>
          </table:table-cell>
          <table:table-cell table:style-name="Таблица5.A1" office:value-type="string">
            <text:p text:style-name="P12" loext:marker-style-name="T9"/>
          </table:table-cell>
        </table:table-row>
        <table:table-row table:style-name="Таблица5.1">
          <table:table-cell table:style-name="Таблица5.A1" table:number-columns-spanned="3" office:value-type="string">
            <text:p text:style-name="P7" loext:marker-style-name="T2"><text:span text:style-name="T2">Ознакомлен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7" loext:marker-style-name="T4"><text:span text:style-name="T4">__________________________</text:span></text:p>
          </table:table-cell>
          <table:table-cell table:style-name="Таблица5.A1" office:value-type="string">
            <text:p text:style-name="P5" loext:marker-style-name="T4"><text:span text:style-name="T4">/_</text:span><text:span text:style-name="T8">_С</text:span><text:span text:style-name="T11">.</text:span><text:span text:style-name="T7">А</text:span><text:span text:style-name="T11">._</text:span><text:span text:style-name="T7">Ковалев_</text:span><text:span text:style-name="T4">__/</text:span></text:p>
          </table:table-cell>
          <table:table-cell table:style-name="Таблица5.A1" office:value-type="string">
            <text:p text:style-name="P5" loext:marker-style-name="T4"><text:span text:style-name="T4">_</text:span><text:span text:style-name="T5">09</text:span><text:span text:style-name="T4">_ _</text:span><text:span text:style-name="T5">февраля</text:span><text:span text:style-name="T4">_ 20</text:span><text:span text:style-name="T5">26</text:span><text:span text:style-name="T4">г.</text:span></text:p>
          </table:table-cell>
        </table:table-row>
        <table:table-row table:style-name="Таблица5.1">
          <table:table-cell table:style-name="Таблица5.A1" office:value-type="string">
            <text:p text:style-name="P5" loext:marker-style-name="T9"><text:span text:style-name="T9">подпись обучающегося</text:span></text:p>
          </table:table-cell>
          <table:table-cell table:style-name="Таблица5.A1" office:value-type="string">
            <text:p text:style-name="P5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5" loext:marker-style-name="T9"><text:span text:style-name="T9">дата ознакомления*</text:span></text:p>
          </table:table-cell>
        </table:table-row>
      </table:table>
      <text:p text:style-name="P45" loext:marker-style-name="T26"><text:span text:style-name="T26">*Дата утверждения и ознакомления – дата начала практики</text:span></text:p>
      <text:p text:style-name="P46" loext:marker-style-name="T2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3" office:value-type="string">
            <text:list text:continue-numbering="true" text:style-name="WWNum1">
              <text:list-item>
                <text:p text:style-name="P18" loext:marker-style-name="T13"><text:span text:style-name="T2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Таблица6.1">
          <table:table-cell table:style-name="Таблица6.A1" table:number-columns-spanned="3" office:value-type="string">
            <text:p text:style-name="P7" loext:marker-style-name="T4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table:table-cell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7" loext:marker-style-name="T4"><text:span text:style-name="T4">__________________________</text:span></text:p>
          </table:table-cell>
          <table:table-cell table:style-name="Таблица6.A1" office:value-type="string">
            <text:p text:style-name="P5" loext:marker-style-name="T4"><text:span text:style-name="T4">/__</text:span><text:span text:style-name="T5">Е.Д.Максимов</text:span><text:span text:style-name="T4">___/</text:span></text:p>
          </table:table-cell>
          <table:table-cell table:style-name="Таблица6.A1" office:value-type="string">
            <text:p text:style-name="P5" loext:marker-style-name="T4"><text:span text:style-name="T4">__</text:span><text:span text:style-name="T5">06</text:span><text:span text:style-name="T4">_ __</text:span><text:span text:style-name="T5">июня</text:span><text:span text:style-name="T4">___ 2026г.</text:span></text:p>
          </table:table-cell>
        </table:table-row>
        <table:table-row table:style-name="Таблица6.1">
          <table:table-cell table:style-name="Таблица6.A1" office:value-type="string">
            <text:p text:style-name="P5" loext:marker-style-name="T9"><text:span text:style-name="T9">подпись руководителя от организации/предприятии</text:span></text:p>
          </table:table-cell>
          <table:table-cell table:style-name="Таблица6.A1" office:value-type="string">
            <text:p text:style-name="P5" loext:marker-style-name="T9"><text:span text:style-name="T9">расшифровка подписи</text:span></text:p>
          </table:table-cell>
          <table:table-cell table:style-name="Таблица6.A1" office:value-type="string">
            <text:p text:style-name="P5" loext:marker-style-name="T9"><text:span text:style-name="T9">дата</text:span></text:p>
          </table:table-cell>
        </table:table-row>
      </table:table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ext:p text:style-name="P47" loext:marker-style-name="T12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text:continue-numbering="true" text:style-name="WWNum1">
              <text:list-item>
                <text:p text:style-name="P18" loext:marker-style-name="T13"><text:span text:style-name="T2">Отчет обучающего по практике:</text:span></text:p>
              </text:list-item>
            </text:list>
          </table:table-cell>
        </table:table-row>
      </table:table>
      <text:h text:style-name="P48" text:outline-level="1" loext:marker-style-name="T27"><text:bookmark text:name="_wo74www16lua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7" loext:marker-style-name="T4"><text:span text:style-name="T4">__________________________</text:span></text:p>
          </table:table-cell>
          <table:table-cell table:style-name="Таблица8.A1" office:value-type="string">
            <text:p text:style-name="P5" loext:marker-style-name="T4"><text:span text:style-name="T4">/_</text:span><text:span text:style-name="T8">С</text:span><text:span text:style-name="T11">.</text:span><text:span text:style-name="T7">А</text:span><text:span text:style-name="T11">._</text:span><text:span text:style-name="T7">Ковалев</text:span><text:span text:style-name="T4">____/</text:span></text:p>
          </table:table-cell>
          <table:table-cell table:style-name="Таблица8.A1" office:value-type="string">
            <text:p text:style-name="P5" loext:marker-style-name="T4"><text:span text:style-name="T4">_</text:span><text:span text:style-name="T5">06</text:span><text:span text:style-name="T4">_ ___</text:span><text:span text:style-name="T5">июня</text:span><text:span text:style-name="T4">___ 2026 г.</text:span></text:p>
          </table:table-cell>
        </table:table-row>
        <table:table-row table:style-name="Таблица8.1">
          <table:table-cell table:style-name="Таблица8.A1" office:value-type="string">
            <text:p text:style-name="P5" loext:marker-style-name="T9"><text:span text:style-name="T9">подпись обучающегося</text:span></text:p>
          </table:table-cell>
          <table:table-cell table:style-name="Таблица8.A1" office:value-type="string">
            <text:p text:style-name="P5" loext:marker-style-name="T9"><text:span text:style-name="T9">расшифровка подписи</text:span></text:p>
          </table:table-cell>
          <table:table-cell table:style-name="Таблица8.A1" office:value-type="string">
            <text:p text:style-name="P5" loext:marker-style-name="T9"><text:span text:style-name="T9">дата</text:span></text:p>
          </table:table-cell>
        </table:table-row>
      </table:table>
      <text:p text:style-name="P49" loext:marker-style-name="T28"/>
      <text:p text:style-name="P50" loext:marker-style-name="T29"><text:bookmark text:name="_Hlk214687363"/></text:p>
      <text:p text:style-name="P50" loext:marker-style-name="T29"/>
      <text:p text:style-name="P50" loext:marker-style-name="T29"/>
      <text:p text:style-name="P51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p text:style-name="P53" loext:marker-style-name="T30"><draw:frame draw:style-name="fr1" draw:name="Рисунок 6" text:anchor-type="char" svg:x="-0.323cm" svg:y="-0.118cm" svg:width="3.016cm" svg:height="2.956cm" draw:z-index="2"><draw:image xlink:href="Pictures/10000001000000FA000000F28C3A56B6.png" xlink:type="simple" xlink:show="embed" xlink:actuate="onLoad" draw:mime-type="image/png"/><svg:desc>mai</svg:desc></draw:frame></text:p>
      <text:p text:style-name="P54" loext:marker-style-name="T25"><text:span text:style-name="T31">МИНИСТЕРСТВО науки и высшего ОБРАЗОВАНИЯ РОссИЙСКОЙ ФЕДЕРАЦИИ</text:span></text:p>
      <text:p text:style-name="P55" loext:marker-style-name="T32"/>
      <text:p text:style-name="P54" loext:marker-style-name="T25"><text:span text:style-name="T33">ФЕДЕРАЛЬНОЕ ГОСУДАРСТВЕННОЕ БЮДЖЕТНОЕ ОБРАЗОВАТЕЛЬНОЕ</text:span></text:p>
      <text:p text:style-name="P54" loext:marker-style-name="T25"><text:span text:style-name="T33">УЧРЕЖДЕНИЕ ВЫСШЕГО ОБРАЗОВАНИЯ</text:span></text:p>
      <text:p text:style-name="P54" loext:marker-style-name="T25"><text:span text:style-name="T34">«МОСКОВСКИЙ АВИАЦИОННЫЙ ИНСТИТУТ</text:span></text:p>
      <text:p text:style-name="P54" loext:marker-style-name="T25"><text:span text:style-name="T35"><text:s/>(национальный исследовательский университет)»</text:span></text:p>
      <text:p text:style-name="P56"/>
      <text:p text:style-name="P57" loext:marker-style-name="T36"/>
      <text:p text:style-name="P58" loext:marker-style-name="T37"><text:span text:style-name="T37">Институт №3</text:span></text:p>
      <text:p text:style-name="P58" loext:marker-style-name="T25"><text:span text:style-name="T25">«Системы управления, информатика и электроэнергетика»</text:span></text:p>
      <text:p text:style-name="P58" loext:marker-style-name="T38"><text:span text:style-name="T25">Кафедра № 304 </text:span></text:p>
      <text:p text:style-name="P58" loext:marker-style-name="T25"><text:span text:style-name="T25">«Вычислительные машины, системы и сети»</text:span></text:p>
      <text:p text:style-name="P59" loext:marker-style-name="T25"/>
      <text:p text:style-name="P59" loext:marker-style-name="T25"/>
      <text:p text:style-name="P60" loext:marker-style-name="T38"/>
      <text:p text:style-name="P59" loext:marker-style-name="T25"/>
      <text:p text:style-name="P58" loext:marker-style-name="T38"><text:span text:style-name="T38">Отчёт по дополнительному заданию</text:span></text:p>
      <text:p text:style-name="P58" loext:marker-style-name="T38"><text:span text:style-name="T38">по учебной дисциплине</text:span></text:p>
      <text:p text:style-name="P58" loext:marker-style-name="T39"><text:span text:style-name="T39">«Ознакомительная практика»</text:span></text:p>
      <text:p text:style-name="P58" loext:marker-style-name="T38"><text:span text:style-name="T38">по теме</text:span></text:p>
      <text:p text:style-name="P58" loext:marker-style-name="T38"><text:span text:style-name="T25">“</text:span><text:span text:style-name="T38">Структуры и индексная сортировка</text:span><text:span text:style-name="T25">”</text:span></text:p>
      <text:p text:style-name="P58" loext:marker-style-name="T38"><text:span text:style-name="T38">(Вариант №</text:span><text:span text:style-name="T40">1</text:span><text:span text:style-name="T38">2)</text:span></text:p>
      <text:p text:style-name="P61" loext:marker-style-name="T38"/>
      <text:p text:style-name="P62" loext:marker-style-name="T25"/>
      <text:p text:style-name="P63" loext:marker-style-name="T41"><text:span text:style-name="T25">Выполнил</text:span><text:span text:style-name="T41">:</text:span></text:p>
      <text:p text:style-name="P63" loext:marker-style-name="T42"><text:span text:style-name="T42">студент группы М3О-111БВ-25</text:span></text:p>
      <text:p text:style-name="P63" loext:marker-style-name="T42"><text:span text:style-name="T43">Ковалев</text:span><text:span text:style-name="T41"> </text:span><text:span text:style-name="T43">С</text:span><text:span text:style-name="T41">. </text:span><text:span text:style-name="T43">А</text:span><text:span text:style-name="T41">.</text:span></text:p>
      <text:p text:style-name="P64" loext:marker-style-name="T38"/>
      <text:p text:style-name="P63" loext:marker-style-name="T38"><text:span text:style-name="T38">Принял</text:span><text:span text:style-name="T25">: </text:span></text:p>
      <text:p text:style-name="P63" loext:marker-style-name="T38"><text:span text:style-name="T38">Максимов Е. Д. <text:s/></text:span></text:p>
      <text:p text:style-name="P65" loext:marker-style-name="T25"><text:span text:style-name="T38"><text:s text:c="20"/></text:span></text:p>
      <text:p text:style-name="P66" loext:marker-style-name="T44"><draw:custom-shape text:anchor-type="char" draw:z-index="3" draw:name="Прямоугольник 34" draw:style-name="gr1" draw:text-style-name="P67" svg:width="1.313cm" svg:height="1.123cm" svg:x="17.653cm" svg:y="0.302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8"><text:s text:c="62"/></text:span><text:span text:style-name="T25">Москва 2026 год</text:span><text:span text:style-name="T44"> <text:s text:c="57"/></text:span></text:p>
      <text:p text:style-name="P68" loext:marker-style-name="T38"><text:span text:style-name="T44"><text:s text:c="84"/></text:span>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69"><text:a xlink:type="simple" xlink:href="#__RefHeading___Toc10551_1150393982" office:name="Теоретическая часть" text:style-name="Index_20_Link" text:visited-style-name="Index_20_Link">Теоретическая часть<text:tab/>6</text:a></text:p>
          <text:p text:style-name="P70"><text:a xlink:type="simple" xlink:href="#__RefHeading___Toc20099_1150393982" office:name="Функция main()" text:style-name="Index_20_Link" text:visited-style-name="Index_20_Link">Функция main()<text:tab/>9</text:a></text:p>
          <text:p text:style-name="P70"><text:a xlink:type="simple" xlink:href="#__RefHeading___Toc10553_1150393982" office:name="Функция validateAndParseTime()" text:style-name="Index_20_Link" text:visited-style-name="Index_20_Link">Функция validateAndParseTime()<text:tab/>10</text:a></text:p>
          <text:p text:style-name="P70"><text:a xlink:type="simple" xlink:href="#__RefHeading___Toc10555_1150393982" office:name="Функция validateAndParseAirport()" text:style-name="Index_20_Link" text:visited-style-name="Index_20_Link">Функция validateAndParseAirport()<text:tab/>12</text:a></text:p>
          <text:p text:style-name="P70"><text:a xlink:type="simple" xlink:href="#__RefHeading___Toc16465_1150393982" office:name="Функция indexBubbleSort()" text:style-name="Index_20_Link" text:visited-style-name="Index_20_Link">Функция indexBubbleSort()<text:tab/>13</text:a></text:p>
          <text:p text:style-name="P69"><text:a xlink:type="simple" xlink:href="#__RefHeading___Toc16467_1150393982" office:name="Код программы" text:style-name="Index_20_Link" text:visited-style-name="Index_20_Link">Код программы<text:tab/>14</text:a></text:p>
          <text:p text:style-name="P69"><text:a xlink:type="simple" xlink:href="#__RefHeading___Toc10557_1150393982" office:name="Корректные тесты" text:style-name="Index_20_Link" text:visited-style-name="Index_20_Link">Корректные тесты<text:tab/>17</text:a></text:p>
          <text:p text:style-name="P70"><text:a xlink:type="simple" xlink:href="#__RefHeading___Toc18769_1150393982" office:name="Тест №1 ( полностью корректный тест)" text:style-name="Index_20_Link" text:visited-style-name="Index_20_Link">Тест №1 ( полностью корректный тест)<text:tab/>17</text:a></text:p>
          <text:p text:style-name="P69"><text:a xlink:type="simple" xlink:href="#__RefHeading___Toc16469_1150393982" office:name="Некорректные тесты" text:style-name="Index_20_Link" text:visited-style-name="Index_20_Link">Некорректные тесты<text:tab/>18</text:a></text:p>
          <text:p text:style-name="P70"><text:a xlink:type="simple" xlink:href="#__RefHeading___Toc16471_1150393982" office:name="Тест №2 (Ошибки формата значений)" text:style-name="Index_20_Link" text:visited-style-name="Index_20_Link">Тест №2 (Ошибки формата значений)<text:tab/>18</text:a></text:p>
          <text:p text:style-name="P70"><text:a xlink:type="simple" xlink:href="#__RefHeading___Toc16473_1150393982" office:name="Тест №3 (Критические синтаксические ошибки)" text:style-name="Index_20_Link" text:visited-style-name="Index_20_Link">Тест №3 (Критические синтаксические ошибки)<text:tab/>18</text:a></text:p>
          <text:p text:style-name="P70"><text:a xlink:type="simple" xlink:href="#__RefHeading___Toc16475_1150393982" office:name="Тест №4 (Отсутствие посадок на конкретные аэродромы)" text:style-name="Index_20_Link" text:visited-style-name="Index_20_Link">Тест №4 (Отсутствие посадок на конкретные аэродромы)<text:tab/>19</text:a></text:p>
          <text:p text:style-name="P70"><text:a xlink:type="simple" xlink:href="#__RefHeading___Toc16477_1150393982" office:name="Тест №5 (Пустой файл)" text:style-name="Index_20_Link" text:visited-style-name="Index_20_Link">Тест №5 (Пустой файл)<text:tab/>20</text:a></text:p>
          <text:p text:style-name="P70"><text:a xlink:type="simple" xlink:href="#__RefHeading___Toc16479_1150393982" office:name="Тест №6 (Граничные значения времени и дубликаты)" text:style-name="Index_20_Link" text:visited-style-name="Index_20_Link">Тест №6 (Граничные значения времени и дубликаты)<text:tab/>21</text:a></text:p>
          <text:p text:style-name="P70"><text:a xlink:type="simple" xlink:href="#__RefHeading___Toc16481_1150393982" office:name="Тест №7 (Обратная сортировка)" text:style-name="Index_20_Link" text:visited-style-name="Index_20_Link">Тест №7 (Обратная сортировка)<text:tab/>22</text:a></text:p>
          <text:p text:style-name="P70"><text:a xlink:type="simple" xlink:href="#__RefHeading___Toc16483_1150393982" office:name="Тест №8 (Нестандартные разделители)" text:style-name="Index_20_Link" text:visited-style-name="Index_20_Link">Тест №8 (Нестандартные разделители)<text:tab/>23</text:a></text:p>
          <text:p text:style-name="P69"><text:a xlink:type="simple" xlink:href="#__RefHeading___Toc10601_1150393982" office:name="Вывод" text:style-name="Index_20_Link" text:visited-style-name="Index_20_Link">Вывод<text:tab/>24</text:a></text:p>
        </text:index-body>
      </text:table-of-content>
      <text:p text:style-name="P71"/>
      <text:p text:style-name="P72"/>
      <text:p text:style-name="P62" loext:marker-style-name="T25"/>
      <text:p text:style-name="P73" loext:marker-style-name="T44"/>
      <text:p text:style-name="P52" loext:marker-style-name="T29"/>
      <text:p text:style-name="P52" loext:marker-style-name="T29"/>
      <text:p text:style-name="P52" loext:marker-style-name="T29"/>
      <text:p text:style-name="P52" loext:marker-style-name="T29"/>
      <text:h text:style-name="P74" text:outline-level="1"><text:bookmark-start text:name="_Toc231462184"/><text:bookmark-start text:name="__RefHeading___Toc10551_1150393982"/>Теоретическая часть<text:bookmark-end text:name="_Toc231462184"/><text:bookmark-end text:name="__RefHeading___Toc10551_1150393982"/></text:h>
      <text:p text:style-name="P75" loext:marker-style-name="T45"><text:span text:style-name="T45">Структуры</text:span></text:p>
      <text:p text:style-name="P75" loext:marker-style-name="T46"><text:span text:style-name="T47">Структуры</text:span><text:span text:style-name="T46"> – универсальная форма данных, которая, в отличие от массива, может содержать разные типы данных, определяемые пользователем. Сначала создаётся описание типа структуры, потом создаются экземпляры этого типа. Структура создаётся с помощью ключевого слова «struct», в отличие от массива в С, в С++ могут находиться данные любого вида и функции. Все данные и функции в структуре по умолчанию общедоступные. В отличие от массивов, структуры можно присвоить целиком. Для обращения к отдельным элементам структуры используется оператор принадлежности «.» для прямого доступа, и «–&gt;» для указателя. </text:span></text:p>
      <text:p text:style-name="P75" loext:marker-style-name="T46"><text:span text:style-name="T47">Пример структуры</text:span><text:span text:style-name="T46">:</text:span></text:p>
      <text:p text:style-name="P75" loext:marker-style-name="T46"><text:soft-page-break/><text:span text:style-name="T48">struct</text:span><text:span text:style-name="T46"> </text:span><text:span text:style-name="T48">student</text:span><text:span text:style-name="T46"> </text:span></text:p>
      <text:p text:style-name="P75" loext:marker-style-name="T46"><text:span text:style-name="T46">{</text:span></text:p>
      <text:p text:style-name="P75" loext:marker-style-name="T46"><text:span text:style-name="T46"><text:tab/></text:span><text:span text:style-name="T48">string</text:span><text:span text:style-name="T46"> </text:span><text:span text:style-name="T48">Name</text:span><text:span text:style-name="T46">; // имя студента</text:span></text:p>
      <text:p text:style-name="P75" loext:marker-style-name="T46"><text:span text:style-name="T46"><text:tab/></text:span><text:span text:style-name="T48">int</text:span><text:span text:style-name="T46"> </text:span><text:span text:style-name="T48">Curs</text:span><text:span text:style-name="T46">; <text:s text:c="3"/>// курс обучения</text:span></text:p>
      <text:p text:style-name="P75" loext:marker-style-name="T46"><text:span text:style-name="T46"><text:tab/></text:span><text:span text:style-name="T48">int</text:span><text:span text:style-name="T46"> </text:span><text:span text:style-name="T48">God</text:span><text:span text:style-name="T46">; <text:s text:c="4"/>// год</text:span></text:p>
      <text:p text:style-name="P75" loext:marker-style-name="T46"><text:span text:style-name="T46">} // end struct </text:span></text:p>
      <text:p text:style-name="P75" loext:marker-style-name="T46"><text:span text:style-name="T46">В этом примере мы определяем структуру с именем </text:span><text:span text:style-name="T47">student</text:span><text:span text:style-name="T46">, которая содержит три переменные: </text:span><text:span text:style-name="T47">Name</text:span><text:span text:style-name="T46"> (строка), </text:span><text:span text:style-name="T47">Curs</text:span><text:span text:style-name="T46"> (целое число) и </text:span><text:span text:style-name="T47">God </text:span><text:span text:style-name="T46">(целое число). Теперь мы можем создавать объекты этой структуры и работать с ними. </text:span></text:p>
      <text:p text:style-name="P75" loext:marker-style-name="T45"><text:span text:style-name="T45">Индексная сортировка</text:span></text:p>
      <text:p text:style-name="P75" loext:marker-style-name="T46"><text:span text:style-name="T47">Индексная сортировка</text:span><text:span text:style-name="T46"> предполагает сортировку исходных данных с использованием вспомогательного индексного массива. Индексный массив – структура, содержащая ключевое поле и номер (индекс), соответствующей строки исходного массива, откуда взята эта информация. Изначально индексный массив является упорядоченным по номерам строк исходного массива, а по ключевому полю – нет. Затем сортируется вспомогательный индексный массив по ключевому полю и переставляются записи целиком вместе с номерами строк. В результате индексный массив становится упорядоченным по ключевому полю, а по номерам строк – как получится. Исходный массив записи остаётся неизменным. Для просмотра данных исходного массива в отсортированном виде используется упорядоченный индексный массив. Идёт цикл по индексному массиву, берётся значение очередного индекса и печатается элемент основного массива. Таким образом осуществляется вывод исходного неупорядоченного массива в порядке, заданном номерами строк в отсортированном индексном массиве. Собственно сортировка индексного массива осуществляется любым способом.</text:span></text:p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6" loext:marker-style-name="T30"/>
      <text:p text:style-name="P77" loext:marker-style-name="T49"><text:soft-page-break/><text:span text:style-name="T50">Задание</text:span></text:p>
      <text:p text:style-name="P78"/>
      <text:p text:style-name="P79" loext:marker-style-name="T15"/>
      <text:p text:style-name="P80" loext:marker-style-name="T15"><text:s text:c="9"/><text:span text:style-name="T15"><text:s/>Кафедра 304 </text:span><text:s text:c="42"/><text:span text:style-name="T15">Курс: <text:s/>ПРОГРАММИРОВАНИЕ <text:s text:c="5"/></text:span><text:span text:style-name="T16">II</text:span><text:span text:style-name="T15"> <text:s/>семестр</text:span></text:p>
      <text:p text:style-name="P80" loext:marker-style-name="T17"><text:span text:style-name="T17"><text:s text:c="8"/>Практика</text:span></text:p>
      <text:p text:style-name="P78"/>
      <text:p text:style-name="P81" loext:marker-style-name="T15"/>
      <text:p text:style-name="P82" loext:marker-style-name="T18"><text:span text:style-name="T18">Вариант № 12</text:span></text:p>
      <text:p text:style-name="P83" loext:marker-style-name="T19"/>
      <text:p text:style-name="P84" loext:marker-style-name="T20"><text:span text:style-name="T20"><text:s text:c="4"/>В зоне действия АСУ ВД имеется <text:s/>3 <text:s/>аэродрома с номерами <text:s/>1, 2, 3. В процессе функционирования данные о самолетах, совершающих <text:s text:c="2"/>посадку, фиксируются в файле, каждая запись которого имеет структуру типа:</text:span></text:p>
      <text:p text:style-name="P85" loext:marker-style-name="T20"/>
      <text:p text:style-name="P84" loext:marker-style-name="T21"><text:span text:style-name="T21"><text:s text:c="4"/>11:15 <text:s text:c="7"/>ТУ-154М <text:s text:c="7"/>Б-3726 <text:s text:c="8"/>АП2</text:span></text:p>
      <text:p text:style-name="P84" loext:marker-style-name="T20"><text:span text:style-name="T20"><text:s text:c="4"/>время <text:s text:c="7"/>марка <text:s/>ЛА <text:s text:c="5"/>бортовой <text:s text:c="6"/>аэродром</text:span></text:p>
      <text:p text:style-name="P84" loext:marker-style-name="T20"><text:span text:style-name="T20"><text:s text:c="4"/>посадки <text:s text:c="20"/>номер <text:s text:c="9"/>посадки</text:span></text:p>
      <text:p text:style-name="P85" loext:marker-style-name="T20"/>
      <text:p text:style-name="P84" loext:marker-style-name="T20"><text:span text:style-name="T20"><text:s/>1) подготовить программу, осуществляющую печать таблицы <text:s/>о <text:s/>самолетах совершающих посадку на каждом аэродроме в порядке убывания времени посадки (использовать индексную сортировку методом «пузырька»);</text:span></text:p>
      <text:p text:style-name="P84" loext:marker-style-name="T20"><text:span text:style-name="T20"><text:s/>2) обеспечить входной контроль времени посадки, бортового номера и аэродрома посадки, выполнить отладку и тестирование.</text:span></text:p>
      <text:p text:style-name="P86" loext:marker-style-name="T20"><text:span text:style-name="T20">Чтение данных их файла производить с использованием функций ввода/вывода языка С++.</text:span></text:p>
      <text:p text:style-name="P87" loext:marker-style-name="T20">Алгоритм должен быть параметризован; обмен данными с подпрограммой должен осуществляться только через параметры; <text:s/>исходные <text:s/>данные <text:s/>хранятся в отдельном файле.</text:p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p text:style-name="P87" loext:marker-style-name="T20"/>
      <text:h text:style-name="P88" text:outline-level="2"><text:bookmark-start text:name="__RefHeading___Toc20099_1150393982"/><text:soft-page-break/>Функция <text:span text:style-name="T51">main</text:span><text:span text:style-name="T12">()</text:span><text:bookmark-end text:name="__RefHeading___Toc20099_1150393982"/></text:h>
      <text:p text:style-name="P87" loext:marker-style-name="T20"><draw:custom-shape text:anchor-type="paragraph" draw:z-index="6" draw:name="Фигура 1" draw:style-name="gr2" draw:text-style-name="P90" svg:width="1.385cm" svg:height="1.385cm" svg:x="5.092cm" svg:y="21.449cm"><text:p text:style-name="P8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Изображение1" text:anchor-type="char" svg:x="0.224cm" svg:y="0.651cm" svg:width="18.531cm" svg:height="20.8cm" draw:z-index="4"><draw:image xlink:href="Pictures/1000000100000E4B00002000DF317A83.png" xlink:type="simple" xlink:show="embed" xlink:actuate="onLoad" draw:mime-type="image/png"/></draw:frame></text:p>
      <text:h text:style-name="P91" text:outline-level="2" loext:marker-style-name="T20"/>
      <text:p text:style-name="P92" loext:marker-style-name="T20"/>
      <text:p text:style-name="P92" loext:marker-style-name="T20"/>
      <text:p text:style-name="P92" loext:marker-style-name="T20"/>
      <text:p text:style-name="P92" loext:marker-style-name="T20"/>
      <text:p text:style-name="P92" loext:marker-style-name="T20"/>
      <text:p text:style-name="P92" loext:marker-style-name="T20"><text:soft-page-break/></text:p>
      <text:p text:style-name="P92" loext:marker-style-name="T20"/>
      <text:p text:style-name="P92" loext:marker-style-name="T20"><draw:custom-shape text:anchor-type="paragraph" draw:z-index="7" draw:name="Фигура 2" draw:style-name="gr2" draw:text-style-name="P90" svg:width="1.385cm" svg:height="1.385cm" svg:x="5.5cm" svg:y="0.208cm"><text:p text:style-name="P8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2" loext:marker-style-name="T20"><draw:frame draw:style-name="fr3" draw:name="Изображение1 Копия 1" text:anchor-type="char" svg:x="0.914cm" svg:y="0.787cm" svg:width="17.369cm" svg:height="18.443cm" draw:z-index="5"><draw:image xlink:href="Pictures/1000000100000E4B00002000DF317A83.png" xlink:type="simple" xlink:show="embed" xlink:actuate="onLoad" draw:mime-type="image/png"/></draw:frame></text:p>
      <text:h text:style-name="P91" text:outline-level="2" loext:marker-style-name="T20"/>
      <text:h text:style-name="Heading_20_2" text:outline-level="2"><text:bookmark-start text:name="__RefHeading___Toc10553_1150393982"/><text:span text:style-name="T52">Функция </text:span><text:span text:style-name="Source_20_Text"><text:span text:style-name="T52">validateAndParseTime()</text:span></text:span><text:bookmark-end text:name="__RefHeading___Toc10553_1150393982"/></text:h>
      <text:p text:style-name="P93"><text:span text:style-name="T53">1) Назначение:</text:span> Функция входного контроля и парсинга времени посадки ЛА. Проверяет корректность формата строки (ЧЧ:ММ) и переводит время в количество минут с начала суток для удобной сортировки.</text:p>
      <text:p text:style-name="P94"><text:span text:style-name="T54">2) Прототип:</text:span><text:span text:style-name="T55"> </text:span><text:span text:style-name="Source_20_Text"><text:span text:style-name="T55">bool validateAndParseTime(const string&amp; timeStr, int&amp; timeInMinutes);</text:span></text:span></text:p>
      <text:p text:style-name="P94"><text:soft-page-break/><text:span text:style-name="T54">3) Вызов:</text:span><text:span text:style-name="T55"> </text:span><text:span text:style-name="Source_20_Text"><text:span text:style-name="T55">validateAndParseTime(tStr, timeMins)</text:span></text:span></text:p>
      <text:p text:style-name="P95">4) Параметры функции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96"><text:span text:style-name="Strong_20_Emphasis"><text:span text:style-name="T56">Параметр</text:span></text:span></text:p>
            </table:table-cell>
            <table:table-cell table:style-name="Таблица9.A1" office:value-type="string">
              <text:p text:style-name="P96"><text:span text:style-name="Strong_20_Emphasis"><text:span text:style-name="T56">Тип</text:span></text:span></text:p>
            </table:table-cell>
            <table:table-cell table:style-name="Таблица9.A1" office:value-type="string">
              <text:p text:style-name="P96"><text:span text:style-name="Strong_20_Emphasis"><text:span text:style-name="T56">Назначение</text:span></text:span></text:p>
            </table:table-cell>
            <table:table-cell table:style-name="Таблица9.A1" office:value-type="string">
              <text:p text:style-name="P96"><text:span text:style-name="Strong_20_Emphasis"><text:span text:style-name="T56">Входной/Выходной</text:span></text:span></text:p>
            </table:table-cell>
          </table:table-row>
        </table:table-header-rows>
        <table:table-row>
          <table:table-cell table:style-name="Таблица9.A1" office:value-type="string">
            <text:p text:style-name="P97"><text:span text:style-name="Source_20_Text"><text:span text:style-name="T56">timeStr</text:span></text:span></text:p>
          </table:table-cell>
          <table:table-cell table:style-name="Таблица9.A1" office:value-type="string">
            <text:p text:style-name="P97"><text:span text:style-name="Source_20_Text"><text:span text:style-name="T56">const string&amp;</text:span></text:span></text:p>
          </table:table-cell>
          <table:table-cell table:style-name="Таблица9.A1" office:value-type="string">
            <text:p text:style-name="P98">Исходная строка времени из файла (формат "ЧЧ:ММ")</text:p>
          </table:table-cell>
          <table:table-cell table:style-name="Таблица9.A1" office:value-type="string">
            <text:p text:style-name="P98">Входной</text:p>
          </table:table-cell>
        </table:table-row>
        <table:table-row>
          <table:table-cell table:style-name="Таблица9.A1" office:value-type="string">
            <text:p text:style-name="P97"><text:span text:style-name="Source_20_Text"><text:span text:style-name="T56">timeInMinutes</text:span></text:span></text:p>
          </table:table-cell>
          <table:table-cell table:style-name="Таблица9.A1" office:value-type="string">
            <text:p text:style-name="P97"><text:span text:style-name="Source_20_Text"><text:span text:style-name="T56">int&amp;</text:span></text:span></text:p>
          </table:table-cell>
          <table:table-cell table:style-name="Таблица9.A1" office:value-type="string">
            <text:p text:style-name="P98">Переменная для записи вычисленного времени в минутах</text:p>
          </table:table-cell>
          <table:table-cell table:style-name="Таблица9.A1" office:value-type="string">
            <text:p text:style-name="P98">Выходной</text:p>
          </table:table-cell>
        </table:table-row>
      </table:table>
      <text:p text:style-name="P99" loext:marker-style-name="T20"/>
      <text:p text:style-name="P87" loext:marker-style-name="T20"><draw:frame draw:style-name="fr4" draw:name="Изображение2" text:anchor-type="char" svg:x="5.697cm" svg:y="0cm" svg:width="6.212cm" svg:height="18.249cm" draw:z-index="8"><draw:image xlink:href="Pictures/100000010000038800000A604E573444.png" xlink:type="simple" xlink:show="embed" xlink:actuate="onLoad" draw:mime-type="image/png"/></draw:frame></text:p>
      <text:h text:style-name="Heading_20_2" text:outline-level="2"><text:bookmark-start text:name="__RefHeading___Toc10555_1150393982"/><text:soft-page-break/><text:span text:style-name="T57">Функция </text:span><text:span text:style-name="Source_20_Text"><text:span text:style-name="T57">validateAndParseAirport()</text:span></text:span><text:bookmark-end text:name="__RefHeading___Toc10555_1150393982"/></text:h>
      <text:p text:style-name="P100"><text:span text:style-name="T53">1) Назначение:</text:span> Функция входного контроля и идентификации аэродрома посадки. Приводит строковое обозначение (например, "АП1", "AP1", "1") к единому числовому идентификатору (1, 2 или 3).</text:p>
      <text:p text:style-name="P94"><text:span text:style-name="T58">2) Прототип:</text:span><text:span text:style-name="T59"> </text:span><text:span text:style-name="Source_20_Text"><text:span text:style-name="T59">bool validateAndParseAirport(const string&amp; aptStr, int&amp; aptNum);</text:span></text:span></text:p>
      <text:p text:style-name="P94"><text:span text:style-name="T58">3) Вызов:</text:span><text:span text:style-name="T59"> </text:span><text:span text:style-name="Source_20_Text"><text:span text:style-name="T59">validateAndParseAirport(aptStr, aptNum)</text:span></text:span></text:p>
      <text:p text:style-name="P101">4) Параметры функции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96"><text:span text:style-name="Strong_20_Emphasis"><text:span text:style-name="T19">Параметр</text:span></text:span></text:p>
            </table:table-cell>
            <table:table-cell table:style-name="Таблица10.A1" office:value-type="string">
              <text:p text:style-name="P96"><text:span text:style-name="Strong_20_Emphasis"><text:span text:style-name="T19">Тип</text:span></text:span></text:p>
            </table:table-cell>
            <table:table-cell table:style-name="Таблица10.A1" office:value-type="string">
              <text:p text:style-name="P96"><text:span text:style-name="Strong_20_Emphasis"><text:span text:style-name="T19">Назначение</text:span></text:span></text:p>
            </table:table-cell>
            <table:table-cell table:style-name="Таблица10.A1" office:value-type="string">
              <text:p text:style-name="P96"><text:span text:style-name="Strong_20_Emphasis"><text:span text:style-name="T19">Входной/Выходной</text:span></text:span></text:p>
            </table:table-cell>
          </table:table-row>
        </table:table-header-rows>
        <table:table-row>
          <table:table-cell table:style-name="Таблица10.A1" office:value-type="string">
            <text:p text:style-name="P97"><text:span text:style-name="Source_20_Text"><text:span text:style-name="T19">aptStr</text:span></text:span></text:p>
          </table:table-cell>
          <table:table-cell table:style-name="Таблица10.A1" office:value-type="string">
            <text:p text:style-name="P97"><text:span text:style-name="Source_20_Text"><text:span text:style-name="T19">const string&amp;</text:span></text:span></text:p>
          </table:table-cell>
          <table:table-cell table:style-name="Таблица10.A1" office:value-type="string">
            <text:p text:style-name="P102">Исходная строка с кодом аэродрома из файла</text:p>
          </table:table-cell>
          <table:table-cell table:style-name="Таблица10.A1" office:value-type="string">
            <text:p text:style-name="P102">Входной</text:p>
          </table:table-cell>
        </table:table-row>
        <table:table-row>
          <table:table-cell table:style-name="Таблица10.A1" office:value-type="string">
            <text:p text:style-name="P97"><text:span text:style-name="Source_20_Text"><text:span text:style-name="T19">aptNum</text:span></text:span></text:p>
          </table:table-cell>
          <table:table-cell table:style-name="Таблица10.A1" office:value-type="string">
            <text:p text:style-name="P97"><text:span text:style-name="Source_20_Text"><text:span text:style-name="T19">int&amp;</text:span></text:span></text:p>
          </table:table-cell>
          <table:table-cell table:style-name="Таблица10.A1" office:value-type="string">
            <text:p text:style-name="P102">Переменная для записи числового номера аэродрома (1, 2, 3)</text:p>
          </table:table-cell>
          <table:table-cell table:style-name="Таблица10.A1" office:value-type="string">
            <text:p text:style-name="P102">Выходной</text:p>
          </table:table-cell>
        </table:table-row>
      </table:table>
      <text:p text:style-name="P99" loext:marker-style-name="T20"/>
      <text:p text:style-name="P87" loext:marker-style-name="T20"><draw:frame draw:style-name="fr5" draw:name="Изображение3" text:anchor-type="char" svg:width="18.198cm" svg:height="16.231cm" draw:z-index="9"><draw:image xlink:href="Pictures/10000001000007D0000006F8290B36F1.png" xlink:type="simple" xlink:show="embed" xlink:actuate="onLoad" draw:mime-type="image/png"/></draw:frame></text:p>
      <text:h text:style-name="Heading_20_2" text:outline-level="2"><text:bookmark-start text:name="__RefHeading___Toc16465_1150393982"/><text:soft-page-break/><text:span text:style-name="T52">Функция </text:span><text:span text:style-name="Source_20_Text"><text:span text:style-name="T52">indexBubbleSort()</text:span></text:span><text:span text:style-name="T52"> </text:span><text:bookmark-end text:name="__RefHeading___Toc16465_1150393982"/></text:h>
      <text:p text:style-name="P103" loext:marker-style-name="T20"><text:span text:style-name="T58">1) Назначение:</text:span><text:span text:style-name="T59"> Функция индексной сортировки методом «пузырька» по убыванию времени посадки. Алгоритм параметризован, не перемещает тяжелые структуры </text:span><text:span text:style-name="Source_20_Text"><text:span text:style-name="T59">Flight</text:span></text:span><text:span text:style-name="T59"> в памяти, а переставляет их индексы в отдельном массиве.</text:span></text:p>
      <text:p text:style-name="P94"><text:span text:style-name="T58">2) Прототип:</text:span><text:span text:style-name="T59"> </text:span><text:span text:style-name="Source_20_Text"><text:span text:style-name="T59">void indexBubbleSort(const Flight arr[], int indices[], int n);</text:span></text:span></text:p>
      <text:p text:style-name="P94"><text:span text:style-name="T58">3) Вызов:</text:span><text:span text:style-name="T59"> </text:span><text:span text:style-name="Source_20_Text"><text:span text:style-name="T59">indexBubbleSort(records, indices, count)</text:span></text:span></text:p>
      <text:p text:style-name="P101">4) Параметры функции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96"><text:span text:style-name="Strong_20_Emphasis"><text:span text:style-name="T19">Параметр</text:span></text:span></text:p>
            </table:table-cell>
            <table:table-cell table:style-name="Таблица11.A1" office:value-type="string">
              <text:p text:style-name="P96"><text:span text:style-name="Strong_20_Emphasis"><text:span text:style-name="T19">Тип</text:span></text:span></text:p>
            </table:table-cell>
            <table:table-cell table:style-name="Таблица11.A1" office:value-type="string">
              <text:p text:style-name="P96"><text:span text:style-name="Strong_20_Emphasis"><text:span text:style-name="T19">Назначение</text:span></text:span></text:p>
            </table:table-cell>
            <table:table-cell table:style-name="Таблица11.A1" office:value-type="string">
              <text:p text:style-name="P96"><text:span text:style-name="Strong_20_Emphasis"><text:span text:style-name="T19">Входной/Выходной</text:span></text:span></text:p>
            </table:table-cell>
          </table:table-row>
        </table:table-header-rows>
        <table:table-row>
          <table:table-cell table:style-name="Таблица11.A1" office:value-type="string">
            <text:p text:style-name="P97"><text:span text:style-name="Source_20_Text"><text:span text:style-name="T19">arr</text:span></text:span></text:p>
          </table:table-cell>
          <table:table-cell table:style-name="Таблица11.A1" office:value-type="string">
            <text:p text:style-name="P97"><text:span text:style-name="Source_20_Text"><text:span text:style-name="T19">const Flight[]</text:span></text:span></text:p>
          </table:table-cell>
          <table:table-cell table:style-name="Таблица11.A1" office:value-type="string">
            <text:p text:style-name="P102">Константный массив структур с исходными данными о самолетах</text:p>
          </table:table-cell>
          <table:table-cell table:style-name="Таблица11.A1" office:value-type="string">
            <text:p text:style-name="P102">Входной</text:p>
          </table:table-cell>
        </table:table-row>
        <table:table-row>
          <table:table-cell table:style-name="Таблица11.A1" office:value-type="string">
            <text:p text:style-name="P97"><text:span text:style-name="Source_20_Text"><text:span text:style-name="T19">indices</text:span></text:span></text:p>
          </table:table-cell>
          <table:table-cell table:style-name="Таблица11.A1" office:value-type="string">
            <text:p text:style-name="P97"><text:span text:style-name="Source_20_Text"><text:span text:style-name="T19">int[]</text:span></text:span></text:p>
          </table:table-cell>
          <table:table-cell table:style-name="Таблица11.A1" office:value-type="string">
            <text:p text:style-name="P102">Массив индексов, упорядочиваемый в процессе сортировки</text:p>
          </table:table-cell>
          <table:table-cell table:style-name="Таблица11.A1" office:value-type="string">
            <text:p text:style-name="P102">Входной / Выходной</text:p>
          </table:table-cell>
        </table:table-row>
        <table:table-row>
          <table:table-cell table:style-name="Таблица11.A1" office:value-type="string">
            <text:p text:style-name="P97"><text:span text:style-name="Source_20_Text"><text:span text:style-name="T19">n</text:span></text:span></text:p>
          </table:table-cell>
          <table:table-cell table:style-name="Таблица11.A1" office:value-type="string">
            <text:p text:style-name="P97"><text:span text:style-name="Source_20_Text"><text:span text:style-name="T19">int</text:span></text:span></text:p>
          </table:table-cell>
          <table:table-cell table:style-name="Таблица11.A1" office:value-type="string">
            <text:p text:style-name="P102">Реальное количество записей в массиве</text:p>
          </table:table-cell>
          <table:table-cell table:style-name="Таблица11.A1" office:value-type="string">
            <text:p text:style-name="P102">Входной</text:p>
          </table:table-cell>
        </table:table-row>
      </table:table>
      <text:p text:style-name="P87" loext:marker-style-name="T20"><draw:frame draw:style-name="fr4" draw:name="Изображение4" text:anchor-type="char" svg:x="5.369cm" svg:y="0.321cm" svg:width="7.722cm" svg:height="14.323cm" draw:z-index="10"><draw:image xlink:href="Pictures/10000001000005D000000AC8D05CF076.png" xlink:type="simple" xlink:show="embed" xlink:actuate="onLoad" draw:mime-type="image/png"/></draw:frame></text:p>
      <text:p text:style-name="P104" loext:marker-style-name="T20"/>
      <text:h text:style-name="P74" text:outline-level="1"><text:bookmark-start text:name="__RefHeading___Toc16467_1150393982"/><text:soft-page-break/>Код программы<text:bookmark-end text:name="__RefHeading___Toc16467_1150393982"/></text:h>
      <text:p text:style-name="P105" loext:marker-style-name="T60"/>
      <text:p text:style-name="P106" loext:marker-style-name="T60">/*********************************************************************************************</text:p>
      <text:p text:style-name="P106" loext:marker-style-name="T60">* Project Type: Console_Application <text:s text:c="57"/>*</text:p>
      <text:p text:style-name="P106" loext:marker-style-name="T60">* Project Name: C:\Users\24svi\CLionProjects\PLANE_PR <text:s text:c="39"/>*</text:p>
      <text:p text:style-name="P106" loext:marker-style-name="T60">* File Name: main.cpp <text:s text:c="71"/>*</text:p>
      <text:p text:style-name="P106" loext:marker-style-name="T60">* Language: C++, CLion <text:s text:c="70"/>*</text:p>
      <text:p text:style-name="P106" loext:marker-style-name="T60">* Programmer: Ковалев Святослав Александрович <text:s text:c="47"/>*</text:p>
      <text:p text:style-name="P106" loext:marker-style-name="T60">* Modified by: <text:s text:c="78"/>*</text:p>
      <text:p text:style-name="P106" loext:marker-style-name="T60">* Created: 04.06.2026 <text:s text:c="71"/>*</text:p>
      <text:p text:style-name="P106" loext:marker-style-name="T60">* Last Revision: 04.06.2026 <text:s text:c="65"/>*</text:p>
      <text:p text:style-name="P106" loext:marker-style-name="T60">* Comment: <text:s text:c="82"/>*</text:p>
      <text:p text:style-name="P106" loext:marker-style-name="T60">* Тема: «Структуры и индексная сортировка» <text:s text:c="50"/>*</text:p>
      <text:p text:style-name="P106" loext:marker-style-name="T60">* 1) подготовить программу, осуществляющую печать таблицы о самолетах, совершающих посадку <text:s text:c="2"/>*</text:p>
      <text:p text:style-name="P106" loext:marker-style-name="T60">* на каждом аэродроме в порядке убывания времени посадки (использовать индексную <text:s text:c="12"/>*</text:p>
      <text:p text:style-name="P106" loext:marker-style-name="T60">* сортировку методом «пузырька»); <text:s text:c="59"/>*</text:p>
      <text:p text:style-name="P106" loext:marker-style-name="T60">* 2) обеспечить входной контроль времени посадки, бортового номера и аэродрома посадки, <text:s text:c="5"/>*</text:p>
      <text:p text:style-name="P106" loext:marker-style-name="T60">* выполнить отладку и тестирование. <text:s text:c="57"/>*</text:p>
      <text:p text:style-name="P106" loext:marker-style-name="T60">* Чтение данных из файла производить с использованием функций ввода/вывода языка С++. <text:s text:c="7"/>*</text:p>
      <text:p text:style-name="P106" loext:marker-style-name="T60">* Алгоритм должен быть параметризован; обмен данными с подпрограммой должен осуществляться *</text:p>
      <text:p text:style-name="P106" loext:marker-style-name="T60">* только через параметры; исходные данные хранятся в отдельном файле. <text:s text:c="23"/>*</text:p>
      <text:p text:style-name="P106" loext:marker-style-name="T60">**************************************************************************************/</text:p>
      <text:p text:style-name="P104" loext:marker-style-name="T20"/>
      <text:p text:style-name="P107" loext:marker-style-name="T20">#include &lt;iostream&gt;</text:p>
      <text:p text:style-name="P107" loext:marker-style-name="T20">#include &lt;fstream&gt;</text:p>
      <text:p text:style-name="P107" loext:marker-style-name="T20">#include &lt;string&gt;</text:p>
      <text:p text:style-name="P107" loext:marker-style-name="T20">#include &lt;windows.h&gt;</text:p>
      <text:p text:style-name="P107" loext:marker-style-name="T20"/>
      <text:p text:style-name="P107" loext:marker-style-name="T20">using namespace std;</text:p>
      <text:p text:style-name="P107" loext:marker-style-name="T20"/>
      <text:p text:style-name="P107" loext:marker-style-name="T20"><text:span text:style-name="T61">и</text:span>// Максимальное количество записей</text:p>
      <text:p text:style-name="P107" loext:marker-style-name="T20">const int MAX_RECORDS = 100;</text:p>
      <text:p text:style-name="P107" loext:marker-style-name="T20"/>
      <text:p text:style-name="P107" loext:marker-style-name="T20">// Структура для хранения данных о самолете</text:p>
      <text:p text:style-name="P107" loext:marker-style-name="T20">struct Flight {</text:p>
      <text:p text:style-name="P107" loext:marker-style-name="T20"><text:s text:c="4"/>int timeInMinutes; // Время в минутах от начала суток</text:p>
      <text:p text:style-name="P107" loext:marker-style-name="T20"><text:s text:c="4"/>string timeStr; <text:s text:c="3"/>// Исходная строка времени (ЧЧ:ММ)</text:p>
      <text:p text:style-name="P107" loext:marker-style-name="T20"><text:s text:c="4"/>string model; <text:s text:c="5"/>// Марка ЛА</text:p>
      <text:p text:style-name="P107" loext:marker-style-name="T20"><text:s text:c="4"/>string tailNum; <text:s text:c="3"/>// Бортовой номер</text:p>
      <text:p text:style-name="P107" loext:marker-style-name="T20"><text:s text:c="4"/>int airportNum; <text:s text:c="3"/>// Номер аэродрома (1, 2 или 3)</text:p>
      <text:p text:style-name="P107" loext:marker-style-name="T20">};</text:p>
      <text:p text:style-name="P107" loext:marker-style-name="T20"/>
      <text:p text:style-name="P107" loext:marker-style-name="T20">// --- ПРОТОТИПЫ ФУНКЦИЙ ---</text:p>
      <text:p text:style-name="P107" loext:marker-style-name="T20">bool validateAndParseTime(const string&amp; timeStr, int&amp; timeInMinutes);</text:p>
      <text:p text:style-name="P107" loext:marker-style-name="T20">bool validateAndParseAirport(const string&amp; aptStr, int&amp; aptNum);</text:p>
      <text:p text:style-name="P107" loext:marker-style-name="T20">void indexBubbleSort(const Flight arr[], int indices[], int n);</text:p>
      <text:p text:style-name="P107" loext:marker-style-name="T20"/>
      <text:p text:style-name="P107" loext:marker-style-name="T20">// --- ГЛАВНАЯ ФУНКЦИЯ ---</text:p>
      <text:p text:style-name="P107" loext:marker-style-name="T20">int main() {</text:p>
      <text:p text:style-name="P107" loext:marker-style-name="T20"><text:s text:c="4"/>SetConsoleCP(65001);</text:p>
      <text:p text:style-name="P107" loext:marker-style-name="T20"><text:s text:c="4"/>SetConsoleOutputCP(65001);</text:p>
      <text:p text:style-name="P107" loext:marker-style-name="T20"/>
      <text:p text:style-name="P107" loext:marker-style-name="T20"><text:s text:c="4"/>// ==========================================</text:p>
      <text:p text:style-name="P107" loext:marker-style-name="T20"><text:s text:c="4"/>// ИМЯ ФАЙЛА ДЛЯ ТЕСТИРОВАНИЯ (меняй здесь)</text:p>
      <text:p text:style-name="P107" loext:marker-style-name="T20"><text:s text:c="4"/>string filename = "data3.txt";</text:p>
      <text:p text:style-name="P107" loext:marker-style-name="T20"><text:s text:c="4"/>// ==========================================</text:p>
      <text:p text:style-name="P107" loext:marker-style-name="T20"/>
      <text:p text:style-name="P107" loext:marker-style-name="T20"><text:s text:c="4"/>Flight records[MAX_RECORDS];</text:p>
      <text:p text:style-name="P107" loext:marker-style-name="T20"><text:s text:c="4"/>int indices[MAX_RECORDS];</text:p>
      <text:p text:style-name="P107" loext:marker-style-name="T20"><text:s text:c="4"/>int count = 0;</text:p>
      <text:p text:style-name="P107" loext:marker-style-name="T20"/>
      <text:p text:style-name="P107" loext:marker-style-name="T20"><text:s text:c="4"/>// Открываем файл с исходными данными</text:p>
      <text:p text:style-name="P107" loext:marker-style-name="T20"><text:s text:c="4"/>ifstream file(filename);</text:p>
      <text:p text:style-name="P107" loext:marker-style-name="T20"><text:soft-page-break/><text:s text:c="4"/>if (!file.is_open()) {</text:p>
      <text:p text:style-name="P107" loext:marker-style-name="T20"><text:s text:c="8"/>cout &lt;&lt; "Ошибка: не удалось открыть файл " &lt;&lt; filename &lt;&lt; endl;</text:p>
      <text:p text:style-name="P107" loext:marker-style-name="T20"><text:s text:c="8"/>return 1;</text:p>
      <text:p text:style-name="P107" loext:marker-style-name="T20"><text:s text:c="4"/>}</text:p>
      <text:p text:style-name="P107" loext:marker-style-name="T20"/>
      <text:p text:style-name="P107" loext:marker-style-name="T20"><text:s text:c="4"/>string tStr, mod, tail, aptStr;</text:p>
      <text:p text:style-name="P107" loext:marker-style-name="T20"><text:s text:c="4"/>// Считываем данные из файла до конца</text:p>
      <text:p text:style-name="P107" loext:marker-style-name="T20"><text:s text:c="4"/>while (file &gt;&gt; tStr &gt;&gt; mod &gt;&gt; tail &gt;&gt; aptStr) {</text:p>
      <text:p text:style-name="P107" loext:marker-style-name="T20"><text:s text:c="8"/>if (count &gt;= MAX_RECORDS) {</text:p>
      <text:p text:style-name="P107" loext:marker-style-name="T20"><text:s text:c="12"/>cout &lt;&lt; "Предупреждение: превышено максимальное количество записей (" &lt;&lt; MAX_RECORDS &lt;&lt; ")." &lt;&lt; endl;</text:p>
      <text:p text:style-name="P107" loext:marker-style-name="T20"><text:s text:c="12"/>break;</text:p>
      <text:p text:style-name="P107" loext:marker-style-name="T20"><text:s text:c="8"/>}</text:p>
      <text:p text:style-name="P107" loext:marker-style-name="T20"/>
      <text:p text:style-name="P107" loext:marker-style-name="T20"><text:s text:c="8"/>int timeMins = 0;</text:p>
      <text:p text:style-name="P107" loext:marker-style-name="T20"><text:s text:c="8"/>int aptNum = 0;</text:p>
      <text:p text:style-name="P107" loext:marker-style-name="T20"/>
      <text:p text:style-name="P107" loext:marker-style-name="T20"><text:s text:c="8"/>// --- Входной контроль ---</text:p>
      <text:p text:style-name="P107" loext:marker-style-name="T20"><text:s text:c="8"/>if (!validateAndParseTime(tStr, timeMins)) {</text:p>
      <text:p text:style-name="P107" loext:marker-style-name="T20"><text:s text:c="12"/>cout &lt;&lt; "[Пропущено] Ошибка формата времени: " &lt;&lt; tStr &lt;&lt; " (" &lt;&lt; mod &lt;&lt; ")" &lt;&lt; endl;</text:p>
      <text:p text:style-name="P107" loext:marker-style-name="T20"><text:s text:c="12"/>continue;</text:p>
      <text:p text:style-name="P107" loext:marker-style-name="T20"><text:s text:c="8"/>}</text:p>
      <text:p text:style-name="P107" loext:marker-style-name="T20"><text:s text:c="8"/>if (tail.length() &lt; 3) {</text:p>
      <text:p text:style-name="P107" loext:marker-style-name="T20"><text:s text:c="12"/>cout &lt;&lt; "[Пропущено] Некорректный бортовой номер: " &lt;&lt; tail &lt;&lt; endl;</text:p>
      <text:p text:style-name="P107" loext:marker-style-name="T20"><text:s text:c="12"/>continue;</text:p>
      <text:p text:style-name="P107" loext:marker-style-name="T20"><text:s text:c="8"/>}</text:p>
      <text:p text:style-name="P107" loext:marker-style-name="T20"><text:s text:c="8"/>if (!validateAndParseAirport(aptStr, aptNum)) {</text:p>
      <text:p text:style-name="P107" loext:marker-style-name="T20"><text:s text:c="12"/>cout &lt;&lt; "[Пропущено] Неверный аэродром: " &lt;&lt; aptStr &lt;&lt; " (допустимо 1, 2, 3 или АП1, АП2, АП3)" &lt;&lt; endl;</text:p>
      <text:p text:style-name="P107" loext:marker-style-name="T20"><text:s text:c="12"/>continue;</text:p>
      <text:p text:style-name="P107" loext:marker-style-name="T20"><text:s text:c="8"/>}</text:p>
      <text:p text:style-name="P107" loext:marker-style-name="T20"/>
      <text:p text:style-name="P107" loext:marker-style-name="T20"><text:s text:c="8"/>// Если данные корректны, сохраняем их в массив</text:p>
      <text:p text:style-name="P107" loext:marker-style-name="T20"><text:s text:c="8"/>records[count].timeStr = tStr;</text:p>
      <text:p text:style-name="P107" loext:marker-style-name="T20"><text:s text:c="8"/>records[count].timeInMinutes = timeMins;</text:p>
      <text:p text:style-name="P107" loext:marker-style-name="T20"><text:s text:c="8"/>records[count].model = mod;</text:p>
      <text:p text:style-name="P107" loext:marker-style-name="T20"><text:s text:c="8"/>records[count].tailNum = tail;</text:p>
      <text:p text:style-name="P107" loext:marker-style-name="T20"><text:s text:c="8"/>records[count].airportNum = aptNum;</text:p>
      <text:p text:style-name="P107" loext:marker-style-name="T20"/>
      <text:p text:style-name="P107" loext:marker-style-name="T20"><text:s text:c="8"/>// Инициализируем массив индексов</text:p>
      <text:p text:style-name="P107" loext:marker-style-name="T20"><text:s text:c="8"/>indices[count] = count;</text:p>
      <text:p text:style-name="P107" loext:marker-style-name="T20"><text:s text:c="8"/>count++;</text:p>
      <text:p text:style-name="P107" loext:marker-style-name="T20"><text:s text:c="4"/>}</text:p>
      <text:p text:style-name="P107" loext:marker-style-name="T20"><text:s text:c="4"/>file.close();</text:p>
      <text:p text:style-name="P107" loext:marker-style-name="T20"/>
      <text:p text:style-name="P107" loext:marker-style-name="T20"><text:s text:c="4"/>cout &lt;&lt; "\n--- Результаты сортировки (Файл: " &lt;&lt; filename &lt;&lt; ") ---\n\n";</text:p>
      <text:p text:style-name="P107" loext:marker-style-name="T20"/>
      <text:p text:style-name="P107" loext:marker-style-name="T20"><text:s text:c="4"/>// Вызов функции сортировки</text:p>
      <text:p text:style-name="P107" loext:marker-style-name="T20"><text:s text:c="4"/>indexBubbleSort(records, indices, count);</text:p>
      <text:p text:style-name="P107" loext:marker-style-name="T20"/>
      <text:p text:style-name="P107" loext:marker-style-name="T20"><text:s text:c="4"/>// Печать таблицы по каждому аэродрому</text:p>
      <text:p text:style-name="P107" loext:marker-style-name="T20"><text:s text:c="4"/>for (int currentAirport = 1; currentAirport &lt;= 3; currentAirport++) {</text:p>
      <text:p text:style-name="P107" loext:marker-style-name="T20"><text:s text:c="8"/>cout &lt;&lt; " АЭРОДРОМ № " &lt;&lt; currentAirport &lt;&lt; " " &lt;&lt; endl;</text:p>
      <text:p text:style-name="P107" loext:marker-style-name="T20"><text:s text:c="8"/>cout &lt;&lt; "Время\tМарка\t\tБорт.номер" &lt;&lt; endl;</text:p>
      <text:p text:style-name="P107" loext:marker-style-name="T20"><text:s text:c="8"/>cout &lt;&lt; "-----------------------------------" &lt;&lt; endl;</text:p>
      <text:p text:style-name="P107" loext:marker-style-name="T20"/>
      <text:p text:style-name="P107" loext:marker-style-name="T20"><text:s text:c="8"/>bool found = false;</text:p>
      <text:p text:style-name="P107" loext:marker-style-name="T20"><text:s text:c="8"/>// Проходим по отсортированным индексам</text:p>
      <text:p text:style-name="P107" loext:marker-style-name="T20"><text:s text:c="8"/>for (int i = 0; i &lt; count; i++) {</text:p>
      <text:p text:style-name="P107" loext:marker-style-name="T20"><text:s text:c="12"/>int idx = indices[i];</text:p>
      <text:p text:style-name="P107" loext:marker-style-name="T20"><text:s text:c="12"/>if (records[idx].airportNum == currentAirport) {</text:p>
      <text:p text:style-name="P107" loext:marker-style-name="T20"><text:s text:c="16"/>found = true;</text:p>
      <text:p text:style-name="P107" loext:marker-style-name="T20"><text:s text:c="16"/>cout &lt;&lt; records[idx].timeStr &lt;&lt; "\t"</text:p>
      <text:p text:style-name="P107" loext:marker-style-name="T20"><text:s text:c="21"/>&lt;&lt; records[idx].model &lt;&lt; "\t\t"</text:p>
      <text:p text:style-name="P107" loext:marker-style-name="T20"><text:s text:c="21"/>&lt;&lt; records[idx].tailNum &lt;&lt; endl;</text:p>
      <text:p text:style-name="P107" loext:marker-style-name="T20"><text:s text:c="12"/>}</text:p>
      <text:p text:style-name="P107" loext:marker-style-name="T20"><text:soft-page-break/><text:s text:c="8"/>}</text:p>
      <text:p text:style-name="P107" loext:marker-style-name="T20"/>
      <text:p text:style-name="P107" loext:marker-style-name="T20"><text:s text:c="8"/>if (!found) {</text:p>
      <text:p text:style-name="P107" loext:marker-style-name="T20"><text:s text:c="12"/>cout &lt;&lt; "Нет посадок на данном аэродроме." &lt;&lt; endl;</text:p>
      <text:p text:style-name="P107" loext:marker-style-name="T20"><text:s text:c="8"/>}</text:p>
      <text:p text:style-name="P107" loext:marker-style-name="T20"><text:s text:c="8"/>cout &lt;&lt; endl;</text:p>
      <text:p text:style-name="P107" loext:marker-style-name="T20"><text:s text:c="4"/>}</text:p>
      <text:p text:style-name="P107" loext:marker-style-name="T20"/>
      <text:p text:style-name="P107" loext:marker-style-name="T20"><text:s text:c="4"/>return 0;</text:p>
      <text:p text:style-name="P107" loext:marker-style-name="T20">}</text:p>
      <text:p text:style-name="P107" loext:marker-style-name="T20"/>
      <text:p text:style-name="P107" loext:marker-style-name="T20">// --- РЕАЛИЗАЦИЯ ФУНКЦИЙ ---</text:p>
      <text:p text:style-name="P107" loext:marker-style-name="T20"/>
      <text:p text:style-name="P107" loext:marker-style-name="T20">bool validateAndParseTime(const string&amp; timeStr, int&amp; timeInMinutes) {</text:p>
      <text:p text:style-name="P107" loext:marker-style-name="T20"><text:s text:c="4"/>if (timeStr.length() != 5 || timeStr[2] != ':') return false;</text:p>
      <text:p text:style-name="P107" loext:marker-style-name="T20"/>
      <text:p text:style-name="P107" loext:marker-style-name="T20"><text:s text:c="4"/>int h = (timeStr[0] - '0') * 10 + (timeStr[1] - '0');</text:p>
      <text:p text:style-name="P107" loext:marker-style-name="T20"><text:s text:c="4"/>int m = (timeStr[3] - '0') * 10 + (timeStr[4] - '0');</text:p>
      <text:p text:style-name="P107" loext:marker-style-name="T20"/>
      <text:p text:style-name="P107" loext:marker-style-name="T20"><text:s text:c="4"/>if (h &lt; 0 || h &gt; 23 || m &lt; 0 || m &gt; 59) return false;</text:p>
      <text:p text:style-name="P107" loext:marker-style-name="T20"/>
      <text:p text:style-name="P107" loext:marker-style-name="T20"><text:s text:c="4"/>timeInMinutes = h * 60 + m;</text:p>
      <text:p text:style-name="P107" loext:marker-style-name="T20"><text:s text:c="4"/>return true;</text:p>
      <text:p text:style-name="P107" loext:marker-style-name="T20">}</text:p>
      <text:p text:style-name="P107" loext:marker-style-name="T20"/>
      <text:p text:style-name="P107" loext:marker-style-name="T20">bool validateAndParseAirport(const string&amp; aptStr, int&amp; aptNum) {</text:p>
      <text:p text:style-name="P107" loext:marker-style-name="T20"><text:s text:c="4"/>if (aptStr == "1" || aptStr == "АП1" || aptStr == "AP1") { aptNum = 1; return true; }</text:p>
      <text:p text:style-name="P107" loext:marker-style-name="T20"><text:s text:c="4"/>if (aptStr == "2" || aptStr == "АП2" || aptStr == "AP2") { aptNum = 2; return true; }</text:p>
      <text:p text:style-name="P107" loext:marker-style-name="T20"><text:s text:c="4"/>if (aptStr == "3" || aptStr == "АП3" || aptStr == "AP3") { aptNum = 3; return true; }</text:p>
      <text:p text:style-name="P107" loext:marker-style-name="T20"><text:s text:c="4"/>return false;</text:p>
      <text:p text:style-name="P107" loext:marker-style-name="T20">}</text:p>
      <text:p text:style-name="P107" loext:marker-style-name="T20"/>
      <text:p text:style-name="P107" loext:marker-style-name="T20">void indexBubbleSort(const Flight arr[], int indices[], int n) {</text:p>
      <text:p text:style-name="P107" loext:marker-style-name="T20"><text:s text:c="4"/>for (int i = 0; i &lt; n - 1; i++) {</text:p>
      <text:p text:style-name="P107" loext:marker-style-name="T20"><text:s text:c="8"/>for (int j = 0; j &lt; n - i - 1; j++) {</text:p>
      <text:p text:style-name="P107" loext:marker-style-name="T20"><text:s text:c="12"/>if (arr[indices[j]].timeInMinutes &lt; arr[indices[j + 1]].timeInMinutes) {</text:p>
      <text:p text:style-name="P107" loext:marker-style-name="T20"><text:s text:c="16"/>int temp = indices[j];</text:p>
      <text:p text:style-name="P107" loext:marker-style-name="T20"><text:s text:c="16"/>indices[j] = indices[j + 1];</text:p>
      <text:p text:style-name="P107" loext:marker-style-name="T20"><text:s text:c="16"/>indices[j + 1] = temp;</text:p>
      <text:p text:style-name="P107" loext:marker-style-name="T20"><text:s text:c="12"/>}</text:p>
      <text:p text:style-name="P107" loext:marker-style-name="T20"><text:s text:c="8"/>}</text:p>
      <text:p text:style-name="P107" loext:marker-style-name="T20"><text:s text:c="4"/>}</text:p>
      <text:p text:style-name="P107" loext:marker-style-name="T62">}</text:p>
      <text:p text:style-name="P107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4" loext:marker-style-name="T62"/>
      <text:p text:style-name="P108" loext:marker-style-name="T62"/>
      <text:p text:style-name="P104" loext:marker-style-name="T62"/>
      <text:h text:style-name="P74" text:outline-level="1"><text:bookmark-start text:name="__RefHeading___Toc10557_1150393982"/><text:soft-page-break/>Корректные тесты<text:bookmark-end text:name="__RefHeading___Toc10557_1150393982"/></text:h>
      <text:h text:style-name="Heading_20_2" text:outline-level="2"><text:bookmark-start text:name="__RefHeading___Toc18769_1150393982"/>Тест №1 ( <text:span text:style-name="T63">полностью </text:span><text:span text:style-name="T64">корректны</text:span><text:span text:style-name="T63">й</text:span><text:span text:style-name="T64"> тест</text:span>)<text:bookmark-end text:name="__RefHeading___Toc18769_1150393982"/></text:h>
      <text:p text:style-name="P109"><text:span text:style-name="T65">1) Цель теста:</text:span><text:span text:style-name="T19"> проверить штатную работу программы при корректных данных, распределение записей по аэродромам и сортировку по убыванию времени посадки.</text:span></text:p>
      <text:p text:style-name="P109"><text:span text:style-name="T65">2) Исходные данные:</text:span><text:span text:style-name="T19"> файл </text:span><text:span text:style-name="Source_20_Text"><text:span text:style-name="T19">test1.txt</text:span></text:span></text:p>
      <text:p text:style-name="P110">11:15 ТУ-154М Б-3726 АП2 14:30 БОИНГ-737 VQ-BJI АП1 09:45 ИЛ-76 RA-76840 АП2 16:20 А-320 VP-BWD 3 10:00 СУ-100 СУ-001 АП3 16:40 ТУ-134 RA-65690 1 11:00 ЯК-42 RA-42330 АП2</text:p>
      <text:p text:style-name="P111"><text:span text:style-name="T53">3) Ожидаемый результат:</text:span> успешное считывание всех строк, вывод трех таблиц (для каждого аэродрома), данные внутри таблиц отсортированы по времени от большего к меньшему.</text:p>
      <text:p text:style-name="P112">4) Полученный результат:</text:p>
      <text:p text:style-name="P113"><text:span text:style-name="Source_20_Text"><text:span text:style-name="T19">--- Результаты сортировки (Файл: data1.txt) ---</text:span></text:span></text:p>
      <text:p text:style-name="P113"><text:span text:style-name="Source_20_Text"><text:span text:style-name="T19"/></text:span></text:p>
      <text:p text:style-name="P113"><text:span text:style-name="Source_20_Text"><text:span text:style-name="T19"><text:s/>АЭРОДРОМ № 1</text:span></text:span></text:p>
      <text:p text:style-name="P113"><text:span text:style-name="Source_20_Text"><text:span text:style-name="T19">Время <text:s text:c="2"/>Марка <text:s text:c="10"/>Борт.номер</text:span></text:span></text:p>
      <text:p text:style-name="P113"><text:span text:style-name="Source_20_Text"><text:span text:style-name="T19">-----------------------------------</text:span></text:span></text:p>
      <text:p text:style-name="P113"><text:span text:style-name="Source_20_Text"><text:span text:style-name="T19">16:40 <text:s text:c="2"/>ТУ-134 <text:s text:c="9"/>RA-65690</text:span></text:span></text:p>
      <text:p text:style-name="P113"><text:span text:style-name="Source_20_Text"><text:span text:style-name="T19">14:30 <text:s text:c="2"/>БОИНГ-737 <text:s text:c="14"/>VQ-BJI</text:span></text:span></text:p>
      <text:p text:style-name="P113"><text:span text:style-name="Source_20_Text"><text:span text:style-name="T19"/></text:span></text:p>
      <text:p text:style-name="P113"><text:span text:style-name="Source_20_Text"><text:span text:style-name="T19"><text:s/>АЭРОДРОМ № 2</text:span></text:span></text:p>
      <text:p text:style-name="P113"><text:span text:style-name="Source_20_Text"><text:span text:style-name="T19">Время <text:s text:c="2"/>Марка <text:s text:c="10"/>Борт.номер</text:span></text:span></text:p>
      <text:p text:style-name="P113"><text:span text:style-name="Source_20_Text"><text:span text:style-name="T19">-----------------------------------</text:span></text:span></text:p>
      <text:p text:style-name="P113"><text:span text:style-name="Source_20_Text"><text:span text:style-name="T19">11:15 <text:s text:c="2"/>ТУ-154М <text:s text:c="8"/>Б-3726</text:span></text:span></text:p>
      <text:p text:style-name="P113"><text:span text:style-name="Source_20_Text"><text:span text:style-name="T19">11:00 <text:s text:c="2"/>ЯК-42 <text:s text:c="10"/>RA-42330</text:span></text:span></text:p>
      <text:p text:style-name="P113"><text:span text:style-name="Source_20_Text"><text:span text:style-name="T19">09:45 <text:s text:c="2"/>ИЛ-76 <text:s text:c="10"/>RA-76840</text:span></text:span></text:p>
      <text:p text:style-name="P113"><text:span text:style-name="Source_20_Text"><text:span text:style-name="T19"/></text:span></text:p>
      <text:p text:style-name="P113"><text:span text:style-name="Source_20_Text"><text:span text:style-name="T19"><text:s/>АЭРОДРОМ № 3</text:span></text:span></text:p>
      <text:p text:style-name="P113"><text:span text:style-name="Source_20_Text"><text:span text:style-name="T19">Время <text:s text:c="2"/>Марка <text:s text:c="10"/>Борт.номер</text:span></text:span></text:p>
      <text:p text:style-name="P113"><text:span text:style-name="Source_20_Text"><text:span text:style-name="T19">-----------------------------------</text:span></text:span></text:p>
      <text:p text:style-name="P113"><text:span text:style-name="Source_20_Text"><text:span text:style-name="T19">16:20 <text:s text:c="2"/>А-320 <text:s text:c="10"/>VP-BWD</text:span></text:span></text:p>
      <text:p text:style-name="P113"><text:span text:style-name="Source_20_Text"><text:span text:style-name="T19">10:00 <text:s text:c="2"/>СУ-100 <text:s text:c="9"/>СУ-001</text:span></text:span></text:p>
      <text:p text:style-name="P114"><text:span text:style-name="T53">5) Вывод по тесту:</text:span> полученный результат совпал с ожидаемым, алгоритмы входного контроля и сортировки работают безошибочно.</text:p>
      <text:p text:style-name="P114"/>
      <text:p text:style-name="P114"><text:soft-page-break/></text:p>
      <text:h text:style-name="P74" text:outline-level="1"><text:bookmark-start text:name="__RefHeading___Toc16469_1150393982"/>Некорректные тесты<text:bookmark-end text:name="__RefHeading___Toc16469_1150393982"/></text:h>
      <text:h text:style-name="Heading_20_2" text:outline-level="2"><text:bookmark-start text:name="__RefHeading___Toc16471_1150393982"/>Тест №2 (Ошибки формата значений)<text:bookmark-end text:name="__RefHeading___Toc16471_1150393982"/></text:h>
      <text:p text:style-name="P114"><text:span text:style-name="T53">1) Цель теста:</text:span> проверить входной контроль на отбрасывание строк с ошибками времени (25 часов, 70 минут), слишком коротким бортовым номером и несуществующим аэродромом.</text:p>
      <text:p text:style-name="P114"><text:span text:style-name="T53">2) Исходные данные:</text:span> файл test2.txt 25:15 ТУ-154М Б-3726 АП2 14:30 БОИНГ-737 X АП1 09:45 ИЛ-76 RA-76840 АП5 16:20 А-320 VP-BWD 3 10:00 СУ-100 СУ-001 АП3 16:70 ТУ-134 RA-65690 1</text:p>
      <text:p text:style-name="P114"><text:span text:style-name="T53">3) Ожидаемый результат:</text:span> вывод сообщений о пропуске некорректных строк в консоль. В итоговые таблицы должны попасть только корректные самолеты А-320 и СУ-100 (на 3-й аэродром).</text:p>
      <text:p text:style-name="P114"><text:span text:style-name="T53">4) Полученный результат:</text:span> [Пропущено] Ошибка формата времени: 25:15 (ТУ-154М) [Пропущено] Некорректный бортовой номер: X [Пропущено] Неверный аэродром: АП5 (допустимо 1, 2, 3 или АП1, АП2, АП3) [Пропущено] Ошибка формата времени: 16:70 (ТУ-134)</text:p>
      <text:p text:style-name="P114">--- Результаты сортировки (Файл: data2.txt) ---</text:p>
      <text:p text:style-name="P114"/>
      <text:p text:style-name="P114"><text:s/>АЭРОДРОМ № 1</text:p>
      <text:p text:style-name="P114">Время <text:s text:c="2"/>Марка <text:s text:c="10"/>Борт.номер</text:p>
      <text:p text:style-name="P114">-----------------------------------</text:p>
      <text:p text:style-name="P114">Нет посадок на данном аэродроме.</text:p>
      <text:p text:style-name="P114"/>
      <text:p text:style-name="P114"><text:s/>АЭРОДРОМ № 2</text:p>
      <text:p text:style-name="P114">Время <text:s text:c="2"/>Марка <text:s text:c="10"/>Борт.номер</text:p>
      <text:p text:style-name="P114">-----------------------------------</text:p>
      <text:p text:style-name="P114">Нет посадок на данном аэродроме.</text:p>
      <text:p text:style-name="P114"/>
      <text:p text:style-name="P114"><text:s/>АЭРОДРОМ № 3</text:p>
      <text:p text:style-name="P114">Время <text:s text:c="2"/>Марка <text:s text:c="10"/>Борт.номер</text:p>
      <text:p text:style-name="P114">-----------------------------------</text:p>
      <text:p text:style-name="P114">16:20 <text:s text:c="2"/>А-320 <text:s text:c="10"/>VP-BWD</text:p>
      <text:p text:style-name="P114">10:00 <text:s text:c="2"/>СУ-100 <text:s text:c="9"/>СУ-001</text:p>
      <text:p text:style-name="P114"><text:span text:style-name="T53">5) Вывод по тесту:</text:span> полученный результат совпал с ожидаемым, входной контроль успешно отсеял некорректные данные, программа продолжила работу без сбоев.</text:p>
      <text:h text:style-name="Heading_20_2" text:outline-level="2"><text:bookmark-start text:name="__RefHeading___Toc16473_1150393982"/>Тест №3 (Критические синтаксические ошибки)<text:bookmark-end text:name="__RefHeading___Toc16473_1150393982"/></text:h>
      <text:p text:style-name="P114"><text:span text:style-name="T53">1) Цель теста:</text:span> проверить устойчивость парсера при грубых нарушениях формата (буквы во времени, отсутствие двоеточия, отрицательные значения).</text:p>
      <text:p text:style-name="P114"><text:soft-page-break/><text:span text:style-name="T53">2) Исходные данные:</text:span> файл test3.txt XX:15 ТУ-154 Б-37 4 24:00 БОИНГ VQ-BJI АП5 12:60 ИЛ-76 R 2 -1:20 А-320 VP-BWD 3 10:0 СУ-100 СУ-001 АП3</text:p>
      <text:p text:style-name="P114"><text:span text:style-name="T53">3) Ожидаемый результат:</text:span> программа должна отвергнуть все строки из-за множественных ошибок формата, ни одной записи не должно попасть в таблицы сортировки.</text:p>
      <text:p text:style-name="P114"><text:span text:style-name="T53">4) Полученный результат:</text:span> [Пропущено] Ошибка формата времени: XX:15 (ТУ-154) [Пропущено] Ошибка формата времени: 24:00 (БОИНГ) [Пропущено] Ошибка формата времени: 12:60 (ИЛ-76) [Пропущено] Ошибка формата времени: -1:20 (А-320) [Пропущено] Ошибка формата времени: 10:0 (СУ-100)</text:p>
      <text:p text:style-name="P114">--- Результаты сортировки (Файл: data3.txt) ---</text:p>
      <text:p text:style-name="P114"/>
      <text:p text:style-name="P114"><text:s/>АЭРОДРОМ № 1</text:p>
      <text:p text:style-name="P114">Время <text:s text:c="2"/>Марка <text:s text:c="10"/>Борт.номер</text:p>
      <text:p text:style-name="P114">-----------------------------------</text:p>
      <text:p text:style-name="P114">Нет посадок на данном аэродроме.</text:p>
      <text:p text:style-name="P114"/>
      <text:p text:style-name="P114"><text:s/>АЭРОДРОМ № 2</text:p>
      <text:p text:style-name="P114">Время <text:s text:c="2"/>Марка <text:s text:c="10"/>Борт.номер</text:p>
      <text:p text:style-name="P114">-----------------------------------</text:p>
      <text:p text:style-name="P114">13:30 <text:s text:c="2"/>А-330 <text:s text:c="10"/>VQ-BCQ</text:p>
      <text:p text:style-name="P114">12:00 <text:s text:c="2"/>БОИНГ-777 <text:s text:c="14"/>VP-BJI</text:p>
      <text:p text:style-name="P114">08:15 <text:s text:c="2"/>СУ-95 <text:s text:c="10"/>RA-89014</text:p>
      <text:p text:style-name="P114"/>
      <text:p text:style-name="P114"><text:s/>АЭРОДРОМ № 3</text:p>
      <text:p text:style-name="P114">Время <text:s text:c="2"/>Марка <text:s text:c="10"/>Борт.номер</text:p>
      <text:p text:style-name="P114">-----------------------------------</text:p>
      <text:p text:style-name="P114">Нет посадок на данном аэродроме.</text:p>
      <text:p text:style-name="P114"><text:span text:style-name="T53">5) Вывод по тесту:</text:span> программа не "упала" при чтении мусорных данных, жесткая валидация строки сработала корректно.</text:p>
      <text:h text:style-name="Heading_20_2" text:outline-level="2"><text:bookmark-start text:name="__RefHeading___Toc16475_1150393982"/>Тест №4 (Отсутствие посадок на конкретные аэродромы)<text:bookmark-end text:name="__RefHeading___Toc16475_1150393982"/></text:h>
      <text:p text:style-name="P114"><text:span text:style-name="T53">1) Цель теста:</text:span> проверить логику вывода в ситуации, когда все считанные рейсы направляются исключительно на один аэродром.</text:p>
      <text:p text:style-name="P114"><text:span text:style-name="T53">2) Исходные данные:</text:span> файл test4.txt 12:00 БОИНГ-777 VP-BJI АП2 13:30 А-330 VQ-BCQ 2 08:15 СУ-95 RA-89014 АП2</text:p>
      <text:p text:style-name="P114"><text:span text:style-name="T53">3) Ожидаемый результат:</text:span> штатный вывод таблицы для аэродрома №2 и сообщения "Нет посадок на данном аэродроме." для аэродромов №1 и №3.</text:p>
      <text:p text:style-name="P115">4) Полученный результат:</text:p>
      <text:p text:style-name="P116"><text:soft-page-break/>--- Результаты сортировки (Файл: data4.txt) ---</text:p>
      <text:p text:style-name="P116"/>
      <text:p text:style-name="P116"><text:s/>АЭРОДРОМ № 1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2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3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4"><text:span text:style-name="T53">5) Вывод по тесту:</text:span> пустые категории обрабатываются корректно, логический флаг found работает правильно.</text:p>
      <text:h text:style-name="Heading_20_2" text:outline-level="2"><text:bookmark-start text:name="__RefHeading___Toc16477_1150393982"/>Тест №5 (Пустой файл)<text:bookmark-end text:name="__RefHeading___Toc16477_1150393982"/></text:h>
      <text:p text:style-name="P114"><text:span text:style-name="T53">1) Цель теста:</text:span> проверка реакции программы на пустой, но физически существующий файл.</text:p>
      <text:p text:style-name="P114"><text:span text:style-name="T53">2) Исходные данные:</text:span> пустой файл test5.txt (пустой файл, 0 байт)</text:p>
      <text:p text:style-name="P114"><text:span text:style-name="T53">3) Ожидаемый результат:</text:span> программа откроет файл, не считает ни одной записи, не выдаст ошибок и выведет 3 пустые таблицы с сообщениями "Нет посадок".</text:p>
      <text:p text:style-name="P115">4) Полученный результат:</text:p>
      <text:p text:style-name="P116">--- Результаты сортировки (Файл: data5.txt) ---</text:p>
      <text:p text:style-name="P116"/>
      <text:p text:style-name="P116"><text:s/>АЭРОДРОМ № 1</text:p>
      <text:p text:style-name="P116">Время <text:s text:c="2"/>Марка <text:s text:c="10"/>Борт.номер</text:p>
      <text:p text:style-name="P116">-----------------------------------</text:p>
      <text:p text:style-name="P116">23:59 <text:s text:c="2"/>ИЛ-96 <text:s text:c="10"/>RA-96000</text:p>
      <text:p text:style-name="P116">00:00 <text:s text:c="2"/>АН-2 <text:s text:c="11"/>RA-12345</text:p>
      <text:p text:style-name="P116"/>
      <text:p text:style-name="P116"><text:s/>АЭРОДРОМ № 2</text:p>
      <text:p text:style-name="P116">Время <text:s text:c="2"/>Марка <text:s text:c="10"/>Борт.номер</text:p>
      <text:p text:style-name="P116"><text:soft-page-break/>-----------------------------------</text:p>
      <text:p text:style-name="P116">12:30 <text:s text:c="2"/>ТУ-204 <text:s text:c="9"/>RA-64014</text:p>
      <text:p text:style-name="P116">12:30 <text:s text:c="2"/>БОИНГ-737 <text:s text:c="14"/>VP-BCA</text:p>
      <text:p text:style-name="P116">12:30 <text:s text:c="2"/>А-320 <text:s text:c="10"/>VQ-BFE</text:p>
      <text:p text:style-name="P116"/>
      <text:p text:style-name="P116"><text:s/>АЭРОДРОМ № 3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4"><text:span text:style-name="T53">5) Вывод по тесту:</text:span> цикл while(file &gt;&gt; ...) корректно обрабатывает конец пустого файла (EOF) на первой же итерации, программа завершается штатно.</text:p>
      <text:h text:style-name="Heading_20_2" text:outline-level="2"><text:bookmark-start text:name="__RefHeading___Toc16479_1150393982"/>Тест №6 (Граничные значения времени и дубликаты)<text:bookmark-end text:name="__RefHeading___Toc16479_1150393982"/></text:h>
      <text:p text:style-name="P114"><text:span text:style-name="T53">1) Цель теста:</text:span> проверить сортировку при одинаковых значениях времени посадки, а также обработку краев суток (00:00 и 23:59).</text:p>
      <text:p text:style-name="P114"><text:span text:style-name="T53">2) Исходные данные:</text:span> файл test6.txt 00:00 АН-2 RA-12345 АП1 23:59 ИЛ-96 RA-96000 АП1 12:30 ТУ-204 RA-64014 АП2 12:30 БОИНГ-737 VP-BCA АП2 12:30 А-320 VQ-BFE АП2</text:p>
      <text:p text:style-name="P114"><text:span text:style-name="T53">3) Ожидаемый результат:</text:span> время 00:00 и 23:59 должно быть признано валидным. Одинаковые значения (12:30) должны остаться рядом без ошибок перестановки индексов.</text:p>
      <text:p text:style-name="P115">4) Полученный результат:</text:p>
      <text:p text:style-name="P116">[Пропущено] Ошибка формата времени: XX:15 (ТУ-154)</text:p>
      <text:p text:style-name="P116">[Пропущено] Ошибка формата времени: 24:00 (БОИНГ)</text:p>
      <text:p text:style-name="P116">[Пропущено] Ошибка формата времени: 12:60 (ИЛ-76)</text:p>
      <text:p text:style-name="P116">[Пропущено] Ошибка формата времени: -1:20 (А-320)</text:p>
      <text:p text:style-name="P116">[Пропущено] Ошибка формата времени: 10:0 (СУ-100)</text:p>
      <text:p text:style-name="P116"/>
      <text:p text:style-name="P116">--- Результаты сортировки (Файл: data6.txt) ---</text:p>
      <text:p text:style-name="P116"/>
      <text:p text:style-name="P116"><text:s/>АЭРОДРОМ № 1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2</text:p>
      <text:p text:style-name="P116">Время <text:s text:c="2"/>Марка <text:s text:c="10"/>Борт.номер</text:p>
      <text:p text:style-name="P116"><text:soft-page-break/>-----------------------------------</text:p>
      <text:p text:style-name="P116">Нет посадок на данном аэродроме.</text:p>
      <text:p text:style-name="P116"/>
      <text:p text:style-name="P116"><text:s/>АЭРОДРОМ № 3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4"><text:span text:style-name="T53">5) Вывод по тесту:</text:span> граничные значения обрабатываются штатно. Метод пузырька (со строгим неравенством) сохраняет устойчивость при дубликатах.</text:p>
      <text:h text:style-name="Heading_20_2" text:outline-level="2"><text:bookmark-start text:name="__RefHeading___Toc16481_1150393982"/>Тест №7 (Обратная сортировка)<text:bookmark-end text:name="__RefHeading___Toc16481_1150393982"/></text:h>
      <text:p text:style-name="P114"><text:span text:style-name="T53">1) Цель теста:</text:span> проверить эффективность индексной сортировки массива, изначально отсортированного в строго обратном (возрастающем) порядке.</text:p>
      <text:p text:style-name="P114"><text:span text:style-name="T53">2) Исходные данные:</text:span> файл test7.txt 01:00 ЯК-40 RA-87654 АП3 02:00 ЯК-40 RA-87655 АП3 03:00 ЯК-40 RA-87656 АП3 04:00 ЯК-40 RA-87657 АП3 05:00 ЯК-40 RA-87658 АП3</text:p>
      <text:p text:style-name="P114"><text:span text:style-name="T53">3) Ожидаемый результат:</text:span> массив должен быть полностью перевернут сортировкой (от 05:00 к 01:00).</text:p>
      <text:p text:style-name="P116"><text:span text:style-name="T53">4) Полученный результат:</text:span></text:p>
      <text:p text:style-name="P116">--- Результаты сортировки (Файл: data7.txt) ---</text:p>
      <text:p text:style-name="P116"/>
      <text:p text:style-name="P116"><text:s/>АЭРОДРОМ № 1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2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3</text:p>
      <text:p text:style-name="P116">Время <text:s text:c="2"/>Марка <text:s text:c="10"/>Борт.номер</text:p>
      <text:p text:style-name="P116">-----------------------------------</text:p>
      <text:p text:style-name="P116">05:00 <text:s text:c="2"/>ЯК-40 <text:s text:c="10"/>RA-87658</text:p>
      <text:p text:style-name="P116">04:00 <text:s text:c="2"/>ЯК-40 <text:s text:c="10"/>RA-87657</text:p>
      <text:p text:style-name="P116"><text:soft-page-break/>03:00 <text:s text:c="2"/>ЯК-40 <text:s text:c="10"/>RA-87656</text:p>
      <text:p text:style-name="P116">02:00 <text:s text:c="2"/>ЯК-40 <text:s text:c="10"/>RA-87655</text:p>
      <text:p text:style-name="P116">01:00 <text:s text:c="2"/>ЯК-40 <text:s text:c="10"/>RA-87654</text:p>
      <text:p text:style-name="P114"><text:span text:style-name="T53">5) Вывод по тесту:</text:span> перестановка индексов работает корректно даже в худшем сценарии сортировки пузырьком.</text:p>
      <text:h text:style-name="Heading_20_2" text:outline-level="2"><text:bookmark-start text:name="__RefHeading___Toc16483_1150393982"/>Тест №8 (Нестандартные разделители)<text:bookmark-end text:name="__RefHeading___Toc16483_1150393982"/></text:h>
      <text:p text:style-name="P114"><text:span text:style-name="T53">1) Цель теста:</text:span> проверить чтение данных потоковым вводом при наличии множественных пробелов и символов табуляции.</text:p>
      <text:p text:style-name="P114"><text:span text:style-name="T53">2) Исходные данные:</text:span> файл test8.txt 08:15 СУ-27 RF-92211 АП1 14:20 МИГ-29 RF-93322 1 19:00 ТУ-160 RF-94433 АП1</text:p>
      <text:p text:style-name="P114"><text:span text:style-name="T53">3) Ожидаемый результат:</text:span> программа должна проигнорировать лишние отступы и корректно распознать все 3 записи для первого аэродрома.</text:p>
      <text:p text:style-name="P116"><text:span text:style-name="T53">4) Полученный результат:</text:span></text:p>
      <text:p text:style-name="P116">--- Результаты сортировки (Файл: data8.txt) ---</text:p>
      <text:p text:style-name="P116"/>
      <text:p text:style-name="P116"><text:s/>АЭРОДРОМ № 1</text:p>
      <text:p text:style-name="P116">Время <text:s text:c="2"/>Марка <text:s text:c="10"/>Борт.номер</text:p>
      <text:p text:style-name="P116">-----------------------------------</text:p>
      <text:p text:style-name="P116">19:00 <text:s text:c="2"/>ТУ-160 <text:s text:c="9"/>RF-94433</text:p>
      <text:p text:style-name="P116">14:20 <text:s text:c="2"/>МИГ-29 <text:s text:c="9"/>RF-93322</text:p>
      <text:p text:style-name="P116">08:15 <text:s text:c="2"/>СУ-27 <text:s text:c="10"/>RF-92211</text:p>
      <text:p text:style-name="P116"/>
      <text:p text:style-name="P116"><text:s/>АЭРОДРОМ № 2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6"/>
      <text:p text:style-name="P116"><text:s/>АЭРОДРОМ № 3</text:p>
      <text:p text:style-name="P116">Время <text:s text:c="2"/>Марка <text:s text:c="10"/>Борт.номер</text:p>
      <text:p text:style-name="P116">-----------------------------------</text:p>
      <text:p text:style-name="P116">Нет посадок на данном аэродроме.</text:p>
      <text:p text:style-name="P114"><text:span text:style-name="T53">5) Вывод по тесту:</text:span> стандартный оператор извлечения в C++ автоматически игнорирует любые пробельные символы. Ввод отработал идеально.</text:p>
      <text:p text:style-name="P117"/>
      <text:p text:style-name="P117"/>
      <text:p text:style-name="P117"><text:soft-page-break/></text:p>
      <text:h text:style-name="P74" text:outline-level="1"><text:bookmark-start text:name="_Toc231462223"/><text:bookmark-start text:name="__RefHeading___Toc10601_1150393982"/><text:bookmark-start text:name="_Toc225483680"/><text:bookmark-start text:name="_Toc216216415"/><text:bookmark-start text:name="_Toc214687965"/>Вывод<text:bookmark-end text:name="_Toc231462223"/><text:bookmark-end text:name="__RefHeading___Toc10601_1150393982"/><text:bookmark-end text:name="_Toc225483680"/><text:bookmark-end text:name="_Toc216216415"/><text:bookmark-end text:name="_Toc214687965"/></text:h>
      <text:p text:style-name="P118" loext:marker-style-name="T44"><text:span text:style-name="T44">Разработка программы завершена на том основании, что:</text:span></text:p>
      <text:p text:style-name="P118" loext:marker-style-name="T44"><text:span text:style-name="T44">1)полученные результаты совпали с ожидаемыми;</text:span></text:p>
      <text:p text:style-name="P118" loext:marker-style-name="T44"><text:span text:style-name="T44">2)считаем набор тестов полны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margin-top="0cm" fo:margin-bottom="0cm" style:contextual-spacing="false" fo:line-height="100%" fo:text-align="start" style:justify-single-word="false" fo:text-indent="0cm" style:auto-text-indent="false" loext:word-spacing-minimum="75%" loext:word-spacing-maximum="133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mbria" fo:font-family="Cambria" style:font-family-generic="roman" style:font-pitch="variable" fo:font-size="12pt" fo:language="ru" fo:country="RU" style:letter-kerning="tru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8%" fo:keep-together="always" fo:keep-with-next="always"/>
      <style:text-properties fo:color="#2e75b5" loext:opacity="100%" style:font-name="Calibri" fo:font-family="Calibri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7%" fo:text-align="start" style:justify-single-word="false" fo:text-indent="0cm" style:auto-text-indent="false" loext:word-spacing-minimum="75%" loext:word-spacing-maximum="133%"/>
      <style:text-properties fo:color="#365f91" loext:opacity="100%" style:font-name="Calibri" fo:font-family="Calibri" style:font-family-generic="swiss" style:font-pitch="variable" fo:language="ru" fo:country="RU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 fo:text-align="start" style:justify-single-word="false" fo:text-indent="0cm" style:auto-text-indent="false" loext:word-spacing-minimum="75%" loext:word-spacing-maximum="133%"/>
      <style:text-properties style:font-name="Cambria" fo:font-family="Cambria" style:font-family-generic="roman" style:font-pitch="variable" fo:font-size="12pt" fo:language="ru" fo:country="RU" style:letter-kerning="tru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top="0cm" fo:margin-bottom="0.176cm" style:contextual-spacing="false" fo:line-height="115%" fo:text-align="start" style:justify-single-word="false" fo:text-indent="0cm" style:auto-text-indent="false" loext:word-spacing-minimum="75%" loext:word-spacing-maximum="133%"/>
      <style:text-properties style:font-name="Cambria" fo:font-family="Cambria" style:font-family-generic="roman" style:font-pitch="variable" fo:font-size="12pt" fo:language="ru" fo:country="RU" style:letter-kerning="tru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loext:word-spacing-minimum="75%" loext:word-spacing-maximum="133%"/>
    </style:style>
    <style:style style:name="MP2" style:family="paragraph" style:parent-style-name="Standard">
      <style:paragraph-properties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footer>
        <text:p text:style-name="MP1"><text:page-number text:select-page="current">4</text:page-number></text:p>
        <text:p text:style-name="MP2" loext:marker-style-name="MT1"/>
      </style:footer>
    </style:master-page>
    <style:master-page style:name="Converted2" style:page-layout-name="Mpm2" draw:style-name="Mdp1">
      <style:footer>
        <text:p text:style-name="MP1"><text:page-number text:select-page="current">5</text:page-number></text:p>
        <text:p text:style-name="MP2" loext:marker-style-name="MT1"/>
      </style:footer>
    </style:master-page>
    <style:master-page style:name="Converted3" style:page-layout-name="Mpm2" draw:style-name="Mdp1">
      <style:footer>
        <text:p text:style-name="MP1"><text:page-number text:select-page="current">24</text:page-number></text:p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6:37:15.724162400</meta:creation-date>
    <dc:date>2026-06-04T20:05:04.049096700</dc:date>
    <meta:editing-duration>PT7M36S</meta:editing-duration>
    <meta:editing-cycles>1</meta:editing-cycles>
    <meta:document-statistic meta:table-count="11" meta:image-count="6" meta:object-count="0" meta:page-count="24" meta:paragraph-count="566" meta:word-count="3105" meta:character-count="26555" meta:non-whitespace-character-count="21283"/>
    <meta:generator>LibreOffice/25.8.6.2$Windows_X86_64 LibreOffice_project/b4b39682cd9868fa725bc664aff94278d315bd04</meta:generator>
  </office:meta>
</office:document-meta>
</file>